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OCUMENTACIÓN DE REQUISITOS Y FLUJO DEL PROYECTO RAG</text:p>
      <text:p text:style-name="Text_20_body">Proyecto: RAG against the machine</text:p>
      <text:p text:style-name="Text_20_body">Objetivo general</text:p>
      <text:p text:style-name="Text_20_body">El objetivo del proyecto es construir una aplicación en Python que implemente un sistema RAG, Retrieval-Augmented Generation, capaz de responder preguntas sobre el código fuente y la documentación del repositorio vLLM.</text:p>
      <text:p text:style-name="Text_20_body">La idea principal no es entrenar un modelo nuevo, sino construir un sistema que permita a un LLM responder usando información recuperada desde una base de conocimiento externa. En este proyecto, esa base de conocimiento será el repositorio vLLM entregado como parte del subject.</text:p>
      <text:p text:style-name="Text_20_body">El sistema debe:</text:p>
      <text:list text:style-name="L1">
        <text:list-item>
          <text:p text:style-name="P1">Leer e ingerir el repositorio vLLM.</text:p>
        </text:list-item>
        <text:list-item>
          <text:p text:style-name="P1">Dividir sus archivos en fragmentos, llamados chunks.</text:p>
        </text:list-item>
        <text:list-item>
          <text:p text:style-name="P1">Crear un índice de búsqueda sobre esos chunks.</text:p>
        </text:list-item>
        <text:list-item>
          <text:p text:style-name="P1">Recuperar los chunks más relevantes para una pregunta.</text:p>
        </text:list-item>
        <text:list-item>
          <text:p text:style-name="P1">Devolver las fuentes encontradas con su ruta y posición exacta dentro del archivo.</text:p>
        </text:list-item>
        <text:list-item>
          <text:p text:style-name="P1">Usar esas fuentes como contexto para que Qwen/Qwen3-0.6B genere una respuesta.</text:p>
        </text:list-item>
        <text:list-item>
          <text:p text:style-name="P1">Evaluar la calidad del sistema de recuperación usando recall@k.</text:p>
        </text:list-item>
        <text:list-item>
          <text:p text:style-name="P1">Exponer las operaciones principales mediante una CLI implementada con Python Fire.</text:p>
        </text:list-item>
      </text:list>
      <text:p text:style-name="Text_20_body">El proyecto se evalúa especialmente por la calidad de la recuperación de fuentes. La generación de respuestas con el LLM es importante, pero si el sistema no recupera buenas fuentes, las respuestas tenderán a ser débiles, incompletas o alucinadas.</text:p>
      <text:p text:style-name="Text_20_body">============================================================</text:p>
      <text:list text:style-name="L2">
        <text:list-item>
          <text:p text:style-name="P2">REQUISITOS OBLIGATORIOS GENERALES</text:p>
        </text:list-item>
      </text:list>
      <text:p text:style-name="Text_20_body">El proyecto debe estar escrito en Python 3.10.</text:p>
      <text:p text:style-name="Text_20_body">Debe utilizar uv como gestor de proyecto y dependencias.</text:p>
      <text:p text:style-name="Text_20_body">Debe proporcionar una interfaz de línea de comandos usando Python Fire.</text:p>
      <text:p text:style-name="Text_20_body">Todas las clases de datos principales deben usar Pydantic para validación y seguridad de tipos.</text:p>
      <text:p text:style-name="Text_20_body">El código debe cumplir flake8.</text:p>
      <text:p text:style-name="Text_20_body">El código debe pasar mypy.</text:p>
      <text:p text:style-name="Text_20_body">Las funciones deben usar type hints.</text:p>
      <text:p text:style-name="Text_20_body">Las funciones y clases deben tener docstrings siguiendo PEP 257.</text:p>
      <text:p text:style-name="Text_20_body"><text:soft-page-break/>El programa debe gestionar errores de forma controlada. Si el programa se cae por una excepción no controlada durante la evaluación, puede considerarse no funcional.</text:p>
      <text:p text:style-name="Text_20_body">Los recursos como archivos, índices o conexiones deben gestionarse correctamente, preferiblemente usando context managers.</text:p>
      <text:p text:style-name="Text_20_body">Las operaciones largas deben mostrar barras de progreso usando tqdm.</text:p>
      <text:p text:style-name="Text_20_body">El README.md debe estar en inglés.</text:p>
      <text:p text:style-name="Text_20_body">Debe existir un Makefile con al menos estas reglas:</text:p>
      <text:p text:style-name="Text_20_body">install:<text:line-break/>Instala las dependencias del proyecto usando uv, pip, pipx u otro gestor válido.</text:p>
      <text:p text:style-name="Text_20_body">run:<text:line-break/>Ejecuta el programa principal.</text:p>
      <text:p text:style-name="Text_20_body">debug:<text:line-break/>Ejecuta el programa en modo debug, por ejemplo usando pdb.</text:p>
      <text:p text:style-name="Text_20_body">clean:<text:line-break/>Elimina archivos temporales y cachés como <text:span text:style-name="Strong_20_Emphasis">pycache</text:span>, .mypy_cache, etc.</text:p>
      <text:p text:style-name="Text_20_body">lint:<text:line-break/>Ejecuta obligatoriamente:</text:p>
      <text:p text:style-name="Text_20_body">flake8 .</text:p>
      <text:p text:style-name="Text_20_body">mypy . --warn-return-any --warn-unused-ignores --ignore-missing-imports --disallow-untyped-defs --check-untyped-defs</text:p>
      <text:p text:style-name="Text_20_body">lint-strict:<text:line-break/>Regla opcional que puede ejecutar:</text:p>
      <text:p text:style-name="Text_20_body">flake8 .</text:p>
      <text:p text:style-name="Text_20_body">mypy . --strict</text:p>
      <text:p text:style-name="Text_20_body">También se recomienda tener tests con pytest o unittest, aunque el subject indica que estos tests no tienen por qué ser entregados o evaluados directamente.</text:p>
      <text:p text:style-name="Text_20_body">============================================================</text:p>
      <text:list text:style-name="L3">
        <text:list-item>
          <text:p text:style-name="P3">REQUISITOS OBLIGATORIOS FUNCIONALES</text:p>
        </text:list-item>
      </text:list>
      <text:p text:style-name="Text_20_body">El sistema debe implementar cinco bloques funcionales principales:</text:p>
      <text:list text:style-name="L4">
        <text:list-item>
          <text:p text:style-name="P4">Knowledge Base Ingestion System</text:p>
        </text:list-item>
        <text:list-item>
          <text:p text:style-name="P4">Retrieval System</text:p>
        </text:list-item>
        <text:list-item>
          <text:p text:style-name="P4">Answer Generation System</text:p>
        </text:list-item>
        <text:list-item>
          <text:p text:style-name="P4">Evaluation System</text:p>
        </text:list-item>
        <text:list-item>
          <text:p text:style-name="P4"><text:soft-page-break/>Command-Line Interface</text:p>
        </text:list-item>
      </text:list>
      <text:p text:style-name="Horizontal_20_Line"/>
      <text:p text:style-name="Text_20_body">2.1. Knowledge Base Ingestion System</text:p>
      <text:p text:style-name="Text_20_body">Este bloque debe leer y procesar los archivos del repositorio vLLM proporcionado en los attachments del proyecto.</text:p>
      <text:p text:style-name="Text_20_body">Debe construir una base de conocimiento buscable.</text:p>
      <text:p text:style-name="Text_20_body">Debe implementar chunking inteligente para al menos:</text:p>
      <text:list text:style-name="L5">
        <text:list-item>
          <text:p text:style-name="P5">código Python;</text:p>
        </text:list-item>
        <text:list-item>
          <text:p text:style-name="P5">documentación Markdown o texto.</text:p>
        </text:list-item>
      </text:list>
      <text:p text:style-name="Text_20_body">Debe crear un índice de búsqueda usando obligatoriamente uno de estos métodos:</text:p>
      <text:list text:style-name="L6">
        <text:list-item>
          <text:p text:style-name="P6">TF-IDF;</text:p>
        </text:list-item>
        <text:list-item>
          <text:p text:style-name="P6">BM25.</text:p>
        </text:list-item>
      </text:list>
      <text:p text:style-name="Text_20_body">Se pueden usar otros métodos adicionales, pero uno de esos dos debe existir.</text:p>
      <text:p text:style-name="Text_20_body">El índice debe guardarse en disco para permitir búsquedas posteriores sin tener que reprocesar todo cada vez.</text:p>
      <text:p text:style-name="Text_20_body">El tiempo máximo de indexación exigido por el subject es 5 minutos.</text:p>
      <text:p text:style-name="Text_20_body">El chunk size máximo es 2000 caracteres.</text:p>
      <text:p text:style-name="Text_20_body">Ese tamaño máximo debe ser configurable mediante un argumento de CLI.</text:p>
      <text:p text:style-name="Text_20_body">La implementación inicial recomendada es empezar por algo simple:</text:p>
      <text:p text:style-name="Text_20_body">raw files<text:line-break/>→ selected files<text:line-break/>→ chunks<text:line-break/>→ BM25 or TF-IDF index<text:line-break/>→ saved index</text:p>
      <text:p text:style-name="Text_20_body">No conviene empezar directamente por generación con LLM. Primero debe funcionar la recuperación.</text:p>
      <text:p text:style-name="Horizontal_20_Line"/>
      <text:p text:style-name="Text_20_body">2.2. Retrieval System</text:p>
      <text:p text:style-name="Text_20_body">El sistema de recuperación debe buscar sobre la base de conocimiento indexada.</text:p>
      <text:p text:style-name="Text_20_body">Para una pregunta dada, debe devolver los top-k chunks más relevantes.</text:p>
      <text:p text:style-name="Text_20_body">Cada resultado recuperado debe incluir obligatoriamente:</text:p>
      <text:list text:style-name="L7">
        <text:list-item>
          <text:p text:style-name="P7">file_path;</text:p>
        </text:list-item>
        <text:list-item>
          <text:p text:style-name="P7">first_character_index;</text:p>
        </text:list-item>
        <text:list-item>
          <text:p text:style-name="P7"><text:soft-page-break/>last_character_index.</text:p>
        </text:list-item>
      </text:list>
      <text:p text:style-name="Text_20_body">El sistema debe soportar preguntas individuales y procesamiento por lotes desde datasets JSON.</text:p>
      <text:p text:style-name="Text_20_body">Debe permitir evaluar recall@k, especialmente recall@5.</text:p>
      <text:p text:style-name="Text_20_body">Los objetivos mínimos indicados por el subject son:</text:p>
      <text:list text:style-name="L8">
        <text:list-item>
          <text:p text:style-name="P8">recall@5 del 80% en preguntas sobre documentación;</text:p>
        </text:list-item>
        <text:list-item>
          <text:p text:style-name="P8">recall@5 del 50% en preguntas sobre código.</text:p>
        </text:list-item>
      </text:list>
      <text:p text:style-name="Text_20_body">Esto significa que no basta con devolver respuestas textuales: el sistema debe localizar correctamente las fuentes dentro del repositorio.</text:p>
      <text:p text:style-name="Horizontal_20_Line"/>
      <text:p text:style-name="Text_20_body">2.3. Answer Generation System</text:p>
      <text:p text:style-name="Text_20_body">El sistema debe usar el modelo:</text:p>
      <text:p text:style-name="Text_20_body">Qwen/Qwen3-0.6B</text:p>
      <text:p text:style-name="Text_20_body">Ese es el modelo por defecto requerido.</text:p>
      <text:p text:style-name="Text_20_body">Se pueden usar otros modelos si el sistema sigue funcionando con Qwen/Qwen3-0.6B.</text:p>
      <text:p text:style-name="Text_20_body">El sistema debe pasar al LLM la pregunta y el contexto recuperado.</text:p>
      <text:p text:style-name="Text_20_body">El contexto debe respetar los límites de tokens del modelo.</text:p>
      <text:p text:style-name="Text_20_body">La respuesta generada debe estar basada en las fuentes recuperadas.</text:p>
      <text:p text:style-name="Text_20_body">Una buena respuesta debe ser:</text:p>
      <text:p text:style-name="Text_20_body">Self-contained:<text:line-break/>Debe poder leerse sin necesidad de ver la pregunta original.</text:p>
      <text:p text:style-name="Text_20_body">Source-grounded:<text:line-break/>Debe apoyarse en las fuentes recuperadas.</text:p>
      <text:p text:style-name="Text_20_body">Faithful:<text:line-break/>No debe inventar información que no esté en las fuentes.</text:p>
      <text:p text:style-name="Text_20_body">Relevant:<text:line-break/>Debe responder directamente a la pregunta.</text:p>
      <text:p text:style-name="Text_20_body">Este bloque no debe compensar un retrieval malo. Si las fuentes recuperadas son malas, la respuesta del LLM será necesariamente poco fiable.</text:p>
      <text:p text:style-name="Horizontal_20_Line"/>
      <text:p text:style-name="Text_20_body">2.4. Evaluation System</text:p>
      <text:p text:style-name="Text_20_body">El sistema debe implementar recall@k.</text:p>
      <text:p text:style-name="Text_20_body"><text:soft-page-break/>La evaluación compara las fuentes recuperadas por el estudiante con las fuentes correctas del dataset de referencia.</text:p>
      <text:p text:style-name="Text_20_body">Una fuente se considera encontrada si existe al menos un 5% de overlap entre la fuente recuperada y una fuente correcta.</text:p>
      <text:p text:style-name="Text_20_body">Si una pregunta tiene varias fuentes correctas, la puntuación de esa pregunta se calcula así:</text:p>
      <text:p text:style-name="Text_20_body">number_found / total_number_of_correct_sources</text:p>
      <text:p text:style-name="Text_20_body">Por ejemplo:</text:p>
      <text:p text:style-name="Text_20_body">Si una pregunta tiene 4 fuentes correctas y el sistema encuentra 2, el score de esa pregunta será:</text:p>
      <text:p text:style-name="Text_20_body">2 / 4 = 0.5</text:p>
      <text:p text:style-name="Text_20_body">El recall@k global será la media de esos resultados sobre todas las preguntas evaluadas.</text:p>
      <text:p text:style-name="Text_20_body">También deben respetarse requisitos de rendimiento:</text:p>
      <text:p text:style-name="Text_20_body">Indexing time:<text:line-break/>máximo 5 minutos.</text:p>
      <text:p text:style-name="Text_20_body">Cold start latency:<text:line-break/>máximo 60 segundos para la primera recuperación después de arrancar el sistema, incluyendo carga del modelo si aplica.</text:p>
      <text:p text:style-name="Text_20_body">Warm retrieval throughput:<text:line-break/>máximo 90 segundos para 1000 preguntas después del cold start.</text:p>
      <text:p text:style-name="Text_20_body">Recall@5:<text:line-break/>mínimo 80% en preguntas de documentación y 50% en preguntas de código.</text:p>
      <text:p text:style-name="Horizontal_20_Line"/>
      <text:p text:style-name="Text_20_body">2.5. Command-Line Interface</text:p>
      <text:p text:style-name="Text_20_body">La aplicación debe exponer una CLI usando Python Fire.</text:p>
      <text:p text:style-name="Text_20_body">Los comandos obligatorios son:</text:p>
      <text:p text:style-name="Text_20_body">index:<text:line-break/>Indexa el repositorio.</text:p>
      <text:p text:style-name="Text_20_body">search:<text:line-break/>Busca fuentes para una única query.</text:p>
      <text:p text:style-name="Text_20_body">search_dataset:<text:line-break/>Procesa múltiples preguntas desde un dataset JSON y guarda los resultados de búsqueda.</text:p>
      <text:p text:style-name="Text_20_body">answer:<text:line-break/>Responde una única pregunta usando contexto recuperado.</text:p>
      <text:p text:style-name="Text_20_body"><text:soft-page-break/>answer_dataset:<text:line-break/>Genera respuestas a partir de resultados de búsqueda previamente guardados.</text:p>
      <text:p text:style-name="Text_20_body">evaluate:<text:line-break/>Evalúa resultados de búsqueda contra ground truth.</text:p>
      <text:p text:style-name="Text_20_body">El subject muestra también un ejemplo de evaluación ejecutada desde moulinette:</text:p>
      <text:p text:style-name="Text_20_body">uv run python -m moulinette evaluate_student_search_results --student_answer_path data/output/search_results/dataset_docs_public.json --dataset_path data/datasets/AnsweredQuestions/dataset_docs_public.json --k 10 --max_context_length 2000</text:p>
      <text:p text:style-name="Text_20_body">Aunque ese comando pertenece a la moulinette, tu salida debe estar en el formato esperado para que esa evaluación pueda validar tus resultados.</text:p>
      <text:p text:style-name="Text_20_body">============================================================</text:p>
      <text:list text:style-name="L9">
        <text:list-item>
          <text:p text:style-name="P9">FLUJO GENERAL DEL PROYECTO</text:p>
        </text:list-item>
      </text:list>
      <text:p text:style-name="Text_20_body">El flujo completo del proyecto es:</text:p>
      <text:p text:style-name="Text_20_body">raw vLLM repo<text:line-break/>→ file discovery<text:line-break/>→ chunking<text:line-break/>→ index<text:line-break/>→ search<text:line-break/>→ JSON search results<text:line-break/>→ evaluation recall@k<text:line-break/>→ answer generation<text:line-break/>→ JSON answers</text:p>
      <text:p text:style-name="Text_20_body">Explicación de cada fase:</text:p>
      <text:p text:style-name="Horizontal_20_Line"/>
      <text:p text:style-name="Text_20_body">3.1. raw vLLM repo</text:p>
      <text:p text:style-name="Text_20_body">El punto de partida es el repositorio vLLM proporcionado por el proyecto.</text:p>
      <text:p text:style-name="Text_20_body">Ejemplo de estructura esperada:</text:p>
      <text:p text:style-name="Text_20_body">data/raw/<text:line-break/>vllm-0.10.1/<text:line-break/>vllm-0.10.1.zip</text:p>
      <text:p text:style-name="Text_20_body">El programa debe trabajar sobre el repositorio extraído.</text:p>
      <text:p text:style-name="Text_20_body">No es obligatorio indexar absolutamente todos los archivos. El subject dice que se deben indexar los archivos que se consideren útiles. Por tanto, debe tomarse una decisión razonada sobre qué archivos incluir y cuáles ignorar.</text:p>
      <text:p text:style-name="Text_20_body">Archivos probablemente útiles:</text:p>
      <text:list text:style-name="L10">
        <text:list-item>
          <text:p text:style-name="P10"><text:soft-page-break/>.py</text:p>
        </text:list-item>
        <text:list-item>
          <text:p text:style-name="P10">.md</text:p>
        </text:list-item>
        <text:list-item>
          <text:p text:style-name="P10">.rst</text:p>
        </text:list-item>
        <text:list-item>
          <text:p text:style-name="P10">.txt</text:p>
        </text:list-item>
        <text:list-item>
          <text:p text:style-name="P10">documentación técnica</text:p>
        </text:list-item>
        <text:list-item>
          <text:p text:style-name="P10">ejemplos relevantes</text:p>
        </text:list-item>
        <text:list-item>
          <text:p text:style-name="P10">archivos de configuración si ayudan a responder preguntas</text:p>
        </text:list-item>
      </text:list>
      <text:p text:style-name="Text_20_body">Archivos probablemente descartables:</text:p>
      <text:list text:style-name="L11">
        <text:list-item>
          <text:p text:style-name="P11">binarios</text:p>
        </text:list-item>
        <text:list-item>
          <text:p text:style-name="P11">imágenes</text:p>
        </text:list-item>
        <text:list-item>
          <text:p text:style-name="P11">cachés</text:p>
        </text:list-item>
        <text:list-item>
          <text:p text:style-name="P11">archivos generados</text:p>
        </text:list-item>
        <text:list-item>
          <text:p text:style-name="P11">carpetas .git</text:p>
        </text:list-item>
        <text:list-item>
          <text:p text:style-name="P11"><text:span text:style-name="Strong_20_Emphasis">pycache</text:span></text:p>
        </text:list-item>
        <text:list-item>
          <text:p text:style-name="P11">entornos virtuales</text:p>
        </text:list-item>
        <text:list-item>
          <text:p text:style-name="P11">archivos demasiado grandes sin valor documental claro</text:p>
        </text:list-item>
      </text:list>
      <text:p text:style-name="Text_20_body">La decisión debe documentarse en el README.</text:p>
      <text:p text:style-name="Horizontal_20_Line"/>
      <text:p text:style-name="Text_20_body">3.2. file discovery</text:p>
      <text:p text:style-name="Text_20_body">File discovery significa recorrer el repositorio y decidir qué archivos entran en la base de conocimiento.</text:p>
      <text:p text:style-name="Text_20_body">Esta fase debe producir una lista de archivos candidatos.</text:p>
      <text:p text:style-name="Text_20_body">Para cada archivo seleccionado, el sistema debe conservar:</text:p>
      <text:list text:style-name="L12">
        <text:list-item>
          <text:p text:style-name="P12">ruta del archivo;</text:p>
        </text:list-item>
        <text:list-item>
          <text:p text:style-name="P12">contenido completo;</text:p>
        </text:list-item>
        <text:list-item>
          <text:p text:style-name="P12">tipo de archivo;</text:p>
        </text:list-item>
        <text:list-item>
          <text:p text:style-name="P12">tamaño;</text:p>
        </text:list-item>
        <text:list-item>
          <text:p text:style-name="P12">metadatos opcionales.</text:p>
        </text:list-item>
      </text:list>
      <text:p text:style-name="Text_20_body">La ruta file_path debe ser consistente. Lo más práctico es usar rutas relativas al root del repositorio indexado, por ejemplo:</text:p>
      <text:p text:style-name="Text_20_body">docs/serving/openai_compatible_server.md</text:p>
      <text:p text:style-name="Text_20_body"><text:soft-page-break/>vllm/entrypoints/openai/api_server.py</text:p>
      <text:p text:style-name="Text_20_body">Es importante no mezclar rutas absolutas y relativas de forma incoherente, porque la evaluación esperará poder comparar file_path con los datasets.</text:p>
      <text:p text:style-name="Horizontal_20_Line"/>
      <text:p text:style-name="Text_20_body">3.3. chunking</text:p>
      <text:p text:style-name="Text_20_body">Chunking significa dividir cada archivo en fragmentos más pequeños.</text:p>
      <text:p text:style-name="Text_20_body">El subject exige estrategias diferentes para distintos tipos de archivos:</text:p>
      <text:list text:style-name="L13">
        <text:list-item>
          <text:p text:style-name="P13">Python code chunking;</text:p>
        </text:list-item>
        <text:list-item>
          <text:p text:style-name="P13">text chunking.</text:p>
        </text:list-item>
      </text:list>
      <text:p text:style-name="Text_20_body">El tamaño máximo de chunk es 2000 caracteres.</text:p>
      <text:p text:style-name="Text_20_body">Este límite debe ser configurable desde CLI, por ejemplo:</text:p>
      <text:p text:style-name="Text_20_body">--max_chunk_size 2000</text:p>
      <text:p text:style-name="Text_20_body">Cada chunk debe conservar obligatoriamente:</text:p>
      <text:list text:style-name="L14">
        <text:list-item>
          <text:p text:style-name="P14">file_path;</text:p>
        </text:list-item>
        <text:list-item>
          <text:p text:style-name="P14">first_character_index;</text:p>
        </text:list-item>
        <text:list-item>
          <text:p text:style-name="P14">last_character_index;</text:p>
        </text:list-item>
        <text:list-item>
          <text:p text:style-name="P14">content.</text:p>
        </text:list-item>
      </text:list>
      <text:p text:style-name="Text_20_body">El content del chunk debe corresponder exactamente al rango indicado por los índices.</text:p>
      <text:p text:style-name="Text_20_body">La parte crítica de esta fase no es sólo cortar texto, sino mantener coordenadas correctas. El evaluador no sólo quiere texto parecido, quiere saber de qué archivo y de qué posición sale la información.</text:p>
      <text:p text:style-name="Text_20_body">Estrategia inicial razonable para Python:</text:p>
      <text:list text:style-name="L15">
        <text:list-item>
          <text:p text:style-name="P15">intentar cortar por clases y funciones;</text:p>
        </text:list-item>
        <text:list-item>
          <text:p text:style-name="P15">si una función o clase es demasiado grande, subdividir;</text:p>
        </text:list-item>
        <text:list-item>
          <text:p text:style-name="P15">si no se puede analizar bien el archivo, usar fallback por tamaño fijo;</text:p>
        </text:list-item>
        <text:list-item>
          <text:p text:style-name="P15">mantener siempre offsets exactos dentro del archivo original.</text:p>
        </text:list-item>
      </text:list>
      <text:p text:style-name="Text_20_body">Estrategia inicial razonable para Markdown/texto:</text:p>
      <text:list text:style-name="L16">
        <text:list-item>
          <text:p text:style-name="P16">intentar cortar por headings;</text:p>
        </text:list-item>
        <text:list-item>
          <text:p text:style-name="P16">luego por párrafos;</text:p>
        </text:list-item>
        <text:list-item>
          <text:p text:style-name="P16">si un bloque supera el límite, subdividir;</text:p>
        </text:list-item>
        <text:list-item>
          <text:p text:style-name="P16">mantener offsets exactos dentro del archivo original.</text:p>
        </text:list-item>
      </text:list>
      <text:p text:style-name="Text_20_body"><text:soft-page-break/>Regla fundamental:</text:p>
      <text:p text:style-name="Text_20_body">Un chunk nunca debe superar max_chunk_size.</text:p>
      <text:p text:style-name="Text_20_body">Si se usa Python slicing internamente, es recomendable trabajar con rangos tipo:</text:p>
      <text:p text:style-name="Text_20_body">[first_character_index, last_character_index)</text:p>
      <text:p text:style-name="Text_20_body">Es decir, inicio incluido y final excluido. Esta convención facilita calcular longitudes y extraer texto con:</text:p>
      <text:p text:style-name="Text_20_body">content = full_text[first_character_index:last_character_index]</text:p>
      <text:p text:style-name="Text_20_body">Sin embargo, lo más importante es ser internamente consistente y que el contenido recuperado coincida con los índices guardados.</text:p>
      <text:p text:style-name="Horizontal_20_Line"/>
      <text:p text:style-name="Text_20_body">3.4. index</text:p>
      <text:p text:style-name="Text_20_body">Indexar significa transformar los chunks en una estructura que permita buscar rápido.</text:p>
      <text:p text:style-name="Text_20_body">El subject obliga a implementar al menos uno de estos métodos:</text:p>
      <text:list text:style-name="L17">
        <text:list-item>
          <text:p text:style-name="P17">TF-IDF;</text:p>
        </text:list-item>
        <text:list-item>
          <text:p text:style-name="P17">BM25.</text:p>
        </text:list-item>
      </text:list>
      <text:p text:style-name="Text_20_body">Para comenzar, BM25 suele ser una buena elección para código y documentación porque funciona bien con palabras clave, nombres de funciones, nombres de clases, rutas y términos técnicos.</text:p>
      <text:p text:style-name="Text_20_body">El índice debe guardarse bajo data/processed/.</text:p>
      <text:p text:style-name="Text_20_body">Ejemplo mostrado por el subject:</text:p>
      <text:p text:style-name="Text_20_body">data/processed/<text:line-break/>bm25_index/<text:line-break/>chunks/</text:p>
      <text:p text:style-name="Text_20_body">La indexación debe poder ejecutarse desde CLI:</text:p>
      <text:p text:style-name="Text_20_body">uv run python -m student index --max_chunk_size 2000</text:p>
      <text:p text:style-name="Text_20_body">Resultado esperado:</text:p>
      <text:p text:style-name="Text_20_body">Ingestion complete! Indices saved under data/processed/</text:p>
      <text:p text:style-name="Text_20_body">En tu implementación, “student” será el nombre del módulo principal que decidas. Lo importante es que el comando funcione con python -m y Python Fire.</text:p>
      <text:p text:style-name="Horizontal_20_Line"/>
      <text:p text:style-name="Text_20_body">3.5. search</text:p>
      <text:p text:style-name="Text_20_body">Search significa recibir una pregunta y devolver los chunks más relevantes.</text:p>
      <text:p text:style-name="Text_20_body">Entrada conceptual:</text:p>
      <text:p text:style-name="Text_20_body"><text:soft-page-break/>question: str<text:line-break/>k: int</text:p>
      <text:p text:style-name="Text_20_body">Salida conceptual:</text:p>
      <text:p text:style-name="Text_20_body">top-k retrieved sources</text:p>
      <text:p text:style-name="Text_20_body">Cada fuente recuperada debe tener:</text:p>
      <text:p text:style-name="Text_20_body">file_path<text:line-break/>first_character_index<text:line-break/>last_character_index</text:p>
      <text:p text:style-name="Text_20_body">Ejemplo conceptual:</text:p>
      <text:p text:style-name="Text_20_body">Pregunta:</text:p>
      <text:p text:style-name="Text_20_body">How to configure OpenAI server?</text:p>
      <text:p text:style-name="Text_20_body">El sistema debería recuperar fuentes como:</text:p>
      <text:p text:style-name="Text_20_body">docs/serving/openai_compatible_server.md<text:line-break/>vllm/entrypoints/openai/api_server.py</text:p>
      <text:p text:style-name="Text_20_body">El comando individual puede tener esta forma:</text:p>
      <text:p text:style-name="Text_20_body">uv run python -m student search "How to configure OpenAI server?" --k 10</text:p>
      <text:p text:style-name="Text_20_body">El subject exige también búsqueda sobre dataset:</text:p>
      <text:p text:style-name="Text_20_body">uv run python -m student search_dataset --dataset_path data/datasets/UnansweredQuestions/dataset_docs_public.json --k 10 --save_directory data/output/search_results</text:p>
      <text:p text:style-name="Text_20_body">El resultado debe guardarse como JSON.</text:p>
      <text:p text:style-name="Horizontal_20_Line"/>
      <text:p text:style-name="Text_20_body">3.6. JSON search results</text:p>
      <text:p text:style-name="Text_20_body">Las búsquedas deben producir un JSON compatible con el modelo StudentSearchResults.</text:p>
      <text:p text:style-name="Text_20_body">La estructura mínima es:</text:p>
      <text:p text:style-name="Text_20_body">{<text:line-break/>"search_results": [<text:line-break/>{<text:line-break/>"question_id": "q1",<text:line-break/>"question": "How to configure OpenAI server?",<text:line-break/>"retrieved_sources": [<text:line-break/>{<text:line-break/>"file_path": "docs/serving/openai_compatible_server.md",<text:line-break/>"first_character_index": 9867,<text:line-break/><text:soft-page-break/>"last_character_index": 10100<text:line-break/>},<text:line-break/>{<text:line-break/>"file_path": "vllm/entrypoints/openai/api_server.py",<text:line-break/>"first_character_index": 267,<text:line-break/>"last_character_index": 400<text:line-break/>}<text:line-break/>]<text:line-break/>}<text:line-break/>],<text:line-break/>"k": 10<text:line-break/>}</text:p>
      <text:p text:style-name="Text_20_body">El subject indica que el modelo mínimo puede ampliarse con campos extra si la implementación lo necesita, pero no debe romper la estructura mínima esperada.</text:p>
      <text:p text:style-name="Text_20_body">Campos obligatorios por resultado de búsqueda:</text:p>
      <text:p text:style-name="Text_20_body">question_id:<text:line-break/>Identificador de la pregunta.</text:p>
      <text:p text:style-name="Text_20_body">question:<text:line-break/>Texto de la pregunta.</text:p>
      <text:p text:style-name="Text_20_body">retrieved_sources:<text:line-break/>Lista de fuentes recuperadas.</text:p>
      <text:p text:style-name="Text_20_body">k:<text:line-break/>Número de resultados solicitados.</text:p>
      <text:p text:style-name="Text_20_body">Cada retrieved_source debe contener:</text:p>
      <text:p text:style-name="Text_20_body">file_path:<text:line-break/>Ruta al archivo fuente.</text:p>
      <text:p text:style-name="Text_20_body">first_character_index:<text:line-break/>Índice inicial del fragmento dentro del archivo.</text:p>
      <text:p text:style-name="Text_20_body">last_character_index:<text:line-break/>Índice final del fragmento dentro del archivo.</text:p>
      <text:p text:style-name="Horizontal_20_Line"/>
      <text:p text:style-name="Text_20_body">3.7. evaluation recall@k</text:p>
      <text:p text:style-name="Text_20_body">La evaluación mide la calidad del retrieval.</text:p>
      <text:p text:style-name="Text_20_body">No evalúa primero si la respuesta suena bien. Evalúa si el sistema ha encontrado las fuentes correctas.</text:p>
      <text:p text:style-name="Text_20_body">La métrica principal es recall@k.</text:p>
      <text:p text:style-name="Text_20_body"><text:soft-page-break/>Para cada pregunta:</text:p>
      <text:list text:style-name="L18">
        <text:list-item>
          <text:p text:style-name="P18">Se toman las k primeras fuentes recuperadas.</text:p>
        </text:list-item>
        <text:list-item>
          <text:p text:style-name="P18">Se comparan con las fuentes correctas del dataset AnsweredQuestions.</text:p>
        </text:list-item>
        <text:list-item>
          <text:p text:style-name="P18">Una fuente correcta cuenta como encontrada si hay al menos 5% de overlap con alguna fuente recuperada.</text:p>
        </text:list-item>
        <text:list-item>
          <text:p text:style-name="P18">La puntuación de la pregunta es:</text:p>
        </text:list-item>
      </text:list>
      <text:p text:style-name="Text_20_body">number_found / total_number_of_correct_sources</text:p>
      <text:p text:style-name="Text_20_body">Después se calcula la media sobre todas las preguntas.</text:p>
      <text:p text:style-name="Text_20_body">Definición práctica de overlap:</text:p>
      <text:p text:style-name="Text_20_body">Una fuente puede verse como un intervalo dentro de un archivo:</text:p>
      <text:p text:style-name="Text_20_body">correct_source:<text:line-break/>file_path = A<text:line-break/>start = c_start<text:line-break/>end = c_end</text:p>
      <text:p text:style-name="Text_20_body">retrieved_source:<text:line-break/>file_path = A<text:line-break/>start = r_start<text:line-break/>end = r_end</text:p>
      <text:p text:style-name="Text_20_body">Sólo puede haber match si file_path coincide.</text:p>
      <text:p text:style-name="Text_20_body">El overlap es la intersección entre ambos rangos:</text:p>
      <text:p text:style-name="Text_20_body">overlap_start = max(c_start, r_start)<text:line-break/>overlap_end = min(c_end, r_end)<text:line-break/>overlap_length = max(0, overlap_end - overlap_start)</text:p>
      <text:p text:style-name="Text_20_body">La fuente se considera encontrada si ese overlap representa al menos el 5%.</text:p>
      <text:p text:style-name="Text_20_body">Una interpretación razonable es compararlo contra la longitud de la fuente correcta:</text:p>
      <text:p text:style-name="Text_20_body">overlap_length / correct_source_length &gt;= 0.05</text:p>
      <text:p text:style-name="Text_20_body">Donde:</text:p>
      <text:p text:style-name="Text_20_body">correct_source_length = c_end - c_start</text:p>
      <text:p text:style-name="Text_20_body">Si no hay overlap o el archivo es distinto, la fuente no cuenta como encontrada.</text:p>
      <text:p text:style-name="Text_20_body">Ejemplo:</text:p>
      <text:p text:style-name="Text_20_body">Fuente correcta:</text:p>
      <text:p text:style-name="Text_20_body"><text:soft-page-break/>file_path = docs/example.md<text:line-break/>first_character_index = 1000<text:line-break/>last_character_index = 2000</text:p>
      <text:p text:style-name="Text_20_body">Fuente recuperada:</text:p>
      <text:p text:style-name="Text_20_body">file_path = docs/example.md<text:line-break/>first_character_index = 1500<text:line-break/>last_character_index = 1700</text:p>
      <text:p text:style-name="Text_20_body">Overlap:</text:p>
      <text:p text:style-name="Text_20_body">1500 a 1700 = 200 caracteres</text:p>
      <text:p text:style-name="Text_20_body">Longitud correcta:</text:p>
      <text:p text:style-name="Text_20_body">2000 - 1000 = 1000 caracteres</text:p>
      <text:p text:style-name="Text_20_body">Porcentaje:</text:p>
      <text:p text:style-name="Text_20_body">200 / 1000 = 20%</text:p>
      <text:p text:style-name="Text_20_body">Como 20% es mayor que 5%, la fuente cuenta como encontrada.</text:p>
      <text:p text:style-name="Text_20_body">Ejemplo negativo:</text:p>
      <text:p text:style-name="Text_20_body">Fuente correcta:</text:p>
      <text:p text:style-name="Text_20_body">1000 a 2000</text:p>
      <text:p text:style-name="Text_20_body">Fuente recuperada:</text:p>
      <text:p text:style-name="Text_20_body">1950 a 1980</text:p>
      <text:p text:style-name="Text_20_body">Overlap:</text:p>
      <text:p text:style-name="Text_20_body">30 caracteres</text:p>
      <text:p text:style-name="Text_20_body">Longitud correcta:</text:p>
      <text:p text:style-name="Text_20_body">1000 caracteres</text:p>
      <text:p text:style-name="Text_20_body">Porcentaje:</text:p>
      <text:p text:style-name="Text_20_body">30 / 1000 = 3%</text:p>
      <text:p text:style-name="Text_20_body">Como 3% es menor que 5%, la fuente no cuenta como encontrada.</text:p>
      <text:p text:style-name="Horizontal_20_Line"/>
      <text:p text:style-name="Text_20_body">3.8. answer generation</text:p>
      <text:p text:style-name="Text_20_body">Una vez el sistema ya recupera fuentes, se puede generar una respuesta.</text:p>
      <text:p text:style-name="Text_20_body">La respuesta debe construirse usando:</text:p>
      <text:list text:style-name="L19">
        <text:list-item>
          <text:p text:style-name="P19">la pregunta;</text:p>
        </text:list-item>
        <text:list-item>
          <text:p text:style-name="P19"><text:soft-page-break/>los chunks recuperados;</text:p>
        </text:list-item>
        <text:list-item>
          <text:p text:style-name="P19">el modelo Qwen/Qwen3-0.6B.</text:p>
        </text:list-item>
      </text:list>
      <text:p text:style-name="Text_20_body">Comando individual mostrado por el subject:</text:p>
      <text:p text:style-name="Text_20_body">uv run python -m student answer "How to configure OpenAI server?" --k 10</text:p>
      <text:p text:style-name="Text_20_body">Parámetro importante:</text:p>
      <text:p text:style-name="Text_20_body">--k:<text:line-break/>Número de fuentes a recuperar y pasar como contexto.</text:p>
      <text:p text:style-name="Text_20_body">El sistema debe preparar un prompt que indique al modelo que responda usando únicamente las fuentes recuperadas.</text:p>
      <text:p text:style-name="Text_20_body">La respuesta no debería inventar datos fuera del contexto.</text:p>
      <text:p text:style-name="Text_20_body">En esta fase hay que controlar el tamaño del contexto, porque no todos los chunks recuperados cabrán necesariamente dentro del límite de tokens del modelo.</text:p>
      <text:p text:style-name="Horizontal_20_Line"/>
      <text:p text:style-name="Text_20_body">3.9. JSON answers</text:p>
      <text:p text:style-name="Text_20_body">Las respuestas deben guardarse en formato compatible con StudentSearchResultsAndAnswer.</text:p>
      <text:p text:style-name="Text_20_body">Estructura mínima:</text:p>
      <text:p text:style-name="Text_20_body">{<text:line-break/>"search_results": [<text:line-break/>{<text:line-break/>"question_id": "q1",<text:line-break/>"question": "How to configure OpenAI server?",<text:line-break/>"retrieved_sources": [<text:line-break/>{<text:line-break/>"file_path": "docs/serving/openai_compatible_server.md",<text:line-break/>"first_character_index": 9867,<text:line-break/>"last_character_index": 10100<text:line-break/>},<text:line-break/>{<text:line-break/>"file_path": "vllm/entrypoints/openai/api_server.py",<text:line-break/>"first_character_index": 267,<text:line-break/>"last_character_index": 400<text:line-break/>}<text:line-break/>],<text:line-break/>"answer": "To configure the OpenAI compatible server in vLLM..."<text:line-break/>}<text:line-break/>],<text:line-break/><text:soft-page-break/>"k": 10<text:line-break/>}</text:p>
      <text:p text:style-name="Text_20_body">La diferencia principal respecto al JSON de búsqueda es que cada resultado incluye también:</text:p>
      <text:p text:style-name="Text_20_body">answer:<text:line-break/>Respuesta generada por el LLM usando el contexto recuperado.</text:p>
      <text:p text:style-name="Text_20_body">El comando de dataset mostrado por el subject es:</text:p>
      <text:p text:style-name="Text_20_body">uv run python -m student answer_dataset --student_search_results_path data/output/search_results/dataset_docs_public.json --save_directory data/output/search_results_and_answer</text:p>
      <text:p text:style-name="Text_20_body">Este comando carga resultados de búsqueda ya generados y produce resultados con respuesta.</text:p>
      <text:p text:style-name="Text_20_body">============================================================</text:p>
      <text:list text:style-name="L20">
        <text:list-item>
          <text:p text:style-name="P20">FORMATOS JSON ESPERADOS</text:p>
        </text:list-item>
      </text:list>
      <text:p text:style-name="Text_20_body">El subject define varios modelos Pydantic que deben implementarse.</text:p>
      <text:p text:style-name="Horizontal_20_Line"/>
      <text:p text:style-name="Text_20_body">4.1. MinimalSource</text:p>
      <text:p text:style-name="Text_20_body">Representa una fuente mínima.</text:p>
      <text:p text:style-name="Text_20_body">Campos:</text:p>
      <text:p text:style-name="Text_20_body">file_path: str<text:line-break/>first_character_index: int<text:line-break/>last_character_index: int</text:p>
      <text:p text:style-name="Text_20_body">Uso:</text:p>
      <text:p text:style-name="Text_20_body">Sirve para identificar exactamente de dónde sale un fragmento de información dentro del repositorio.</text:p>
      <text:p text:style-name="Text_20_body">Ejemplo:</text:p>
      <text:p text:style-name="Text_20_body">{<text:line-break/>"file_path": "docs/serving/openai_compatible_server.md",<text:line-break/>"first_character_index": 9867,<text:line-break/>"last_character_index": 10100<text:line-break/>}</text:p>
      <text:p text:style-name="Horizontal_20_Line"/>
      <text:p text:style-name="Text_20_body">4.2. UnansweredQuestion</text:p>
      <text:p text:style-name="Text_20_body">Representa una pregunta sin respuesta.</text:p>
      <text:p text:style-name="Text_20_body">Campos:</text:p>
      <text:p text:style-name="Text_20_body"><text:soft-page-break/>question_id: str<text:line-break/>question: str</text:p>
      <text:p text:style-name="Text_20_body">El question_id puede generarse automáticamente con uuid si no existe.</text:p>
      <text:p text:style-name="Text_20_body">Ejemplo:</text:p>
      <text:p text:style-name="Text_20_body">{<text:line-break/>"question_id": "q1",<text:line-break/>"question": "How to configure OpenAI server?"<text:line-break/>}</text:p>
      <text:p text:style-name="Horizontal_20_Line"/>
      <text:p text:style-name="Text_20_body">4.3. AnsweredQuestion</text:p>
      <text:p text:style-name="Text_20_body">Extiende UnansweredQuestion.</text:p>
      <text:p text:style-name="Text_20_body">Campos:</text:p>
      <text:p text:style-name="Text_20_body">question_id: str<text:line-break/>question: str<text:line-break/>sources: List[MinimalSource]<text:line-break/>answer: str</text:p>
      <text:p text:style-name="Text_20_body">Representa una pregunta que ya tiene respuesta esperada y fuentes correctas.</text:p>
      <text:p text:style-name="Text_20_body">Este formato se usa en datasets de referencia para evaluación.</text:p>
      <text:p text:style-name="Text_20_body">Ejemplo:</text:p>
      <text:p text:style-name="Text_20_body">{<text:line-break/>"question_id": "q1",<text:line-break/>"question": "How to configure OpenAI server?",<text:line-break/>"sources": [<text:line-break/>{<text:line-break/>"file_path": "docs/serving/openai_compatible_server.md",<text:line-break/>"first_character_index": 9867,<text:line-break/>"last_character_index": 10100<text:line-break/>}<text:line-break/>],<text:line-break/>"answer": "Expected answer text..."<text:line-break/>}</text:p>
      <text:p text:style-name="Horizontal_20_Line"/>
      <text:p text:style-name="Text_20_body">4.4. RagDataset</text:p>
      <text:p text:style-name="Text_20_body">Representa un dataset completo de preguntas.</text:p>
      <text:p text:style-name="Text_20_body">Campo:</text:p>
      <text:p text:style-name="Text_20_body"><text:soft-page-break/>rag_questions: List[AnsweredQuestion | UnansweredQuestion]</text:p>
      <text:p text:style-name="Text_20_body">Ejemplo:</text:p>
      <text:p text:style-name="Text_20_body">{<text:line-break/>"rag_questions": [<text:line-break/>{<text:line-break/>"question_id": "q1",<text:line-break/>"question": "How to configure OpenAI server?"<text:line-break/>}<text:line-break/>]<text:line-break/>}</text:p>
      <text:p text:style-name="Text_20_body">Los datasets de UnansweredQuestions contendrán preguntas sin fuentes ni respuestas.</text:p>
      <text:p text:style-name="Text_20_body">Los datasets de AnsweredQuestions contendrán preguntas con fuentes correctas y respuesta esperada.</text:p>
      <text:p text:style-name="Horizontal_20_Line"/>
      <text:p text:style-name="Text_20_body">4.5. MinimalSearchResults</text:p>
      <text:p text:style-name="Text_20_body">Representa el resultado de búsqueda para una pregunta.</text:p>
      <text:p text:style-name="Text_20_body">Campos:</text:p>
      <text:p text:style-name="Text_20_body">question_id: str<text:line-break/>question: str<text:line-break/>retrieved_sources: List[MinimalSource]</text:p>
      <text:p text:style-name="Text_20_body">Ejemplo:</text:p>
      <text:p text:style-name="Text_20_body">{<text:line-break/>"question_id": "q1",<text:line-break/>"question": "How to configure OpenAI server?",<text:line-break/>"retrieved_sources": [<text:line-break/>{<text:line-break/>"file_path": "docs/serving/openai_compatible_server.md",<text:line-break/>"first_character_index": 9867,<text:line-break/>"last_character_index": 10100<text:line-break/>}<text:line-break/>]<text:line-break/>}</text:p>
      <text:p text:style-name="Horizontal_20_Line"/>
      <text:p text:style-name="Text_20_body">4.6. MinimalAnswer</text:p>
      <text:p text:style-name="Text_20_body">Extiende MinimalSearchResults.</text:p>
      <text:p text:style-name="Text_20_body">Campos:</text:p>
      <text:p text:style-name="Text_20_body"><text:soft-page-break/>question_id: str<text:line-break/>question: str<text:line-break/>retrieved_sources: List[MinimalSource]<text:line-break/>answer: str</text:p>
      <text:p text:style-name="Text_20_body">Ejemplo:</text:p>
      <text:p text:style-name="Text_20_body">{<text:line-break/>"question_id": "q1",<text:line-break/>"question": "How to configure OpenAI server?",<text:line-break/>"retrieved_sources": [<text:line-break/>{<text:line-break/>"file_path": "docs/serving/openai_compatible_server.md",<text:line-break/>"first_character_index": 9867,<text:line-break/>"last_character_index": 10100<text:line-break/>}<text:line-break/>],<text:line-break/>"answer": "To configure the OpenAI compatible server in vLLM..."<text:line-break/>}</text:p>
      <text:p text:style-name="Horizontal_20_Line"/>
      <text:p text:style-name="Text_20_body">4.7. StudentSearchResults</text:p>
      <text:p text:style-name="Text_20_body">Representa los resultados de búsqueda de un conjunto de preguntas.</text:p>
      <text:p text:style-name="Text_20_body">Campos:</text:p>
      <text:p text:style-name="Text_20_body">search_results: List[MinimalSearchResults]<text:line-break/>k: int</text:p>
      <text:p text:style-name="Text_20_body">Ejemplo:</text:p>
      <text:p text:style-name="Text_20_body">{<text:line-break/>"search_results": [<text:line-break/>{<text:line-break/>"question_id": "q1",<text:line-break/>"question": "How to configure OpenAI server?",<text:line-break/>"retrieved_sources": [<text:line-break/>{<text:line-break/>"file_path": "docs/serving/openai_compatible_server.md",<text:line-break/>"first_character_index": 9867,<text:line-break/>"last_character_index": 10100<text:line-break/>}<text:line-break/>]<text:line-break/>}<text:line-break/>],<text:line-break/><text:soft-page-break/>"k": 10<text:line-break/>}</text:p>
      <text:p text:style-name="Horizontal_20_Line"/>
      <text:p text:style-name="Text_20_body">4.8. StudentSearchResultsAndAnswer</text:p>
      <text:p text:style-name="Text_20_body">Extiende StudentSearchResults.</text:p>
      <text:p text:style-name="Text_20_body">Campos:</text:p>
      <text:p text:style-name="Text_20_body">search_results: List[MinimalAnswer]<text:line-break/>k: int</text:p>
      <text:p text:style-name="Text_20_body">Ejemplo:</text:p>
      <text:p text:style-name="Text_20_body">{<text:line-break/>"search_results": [<text:line-break/>{<text:line-break/>"question_id": "q1",<text:line-break/>"question": "How to configure OpenAI server?",<text:line-break/>"retrieved_sources": [<text:line-break/>{<text:line-break/>"file_path": "docs/serving/openai_compatible_server.md",<text:line-break/>"first_character_index": 9867,<text:line-break/>"last_character_index": 10100<text:line-break/>}<text:line-break/>],<text:line-break/>"answer": "To configure the OpenAI compatible server in vLLM..."<text:line-break/>}<text:line-break/>],<text:line-break/>"k": 10<text:line-break/>}</text:p>
      <text:p text:style-name="Text_20_body">============================================================</text:p>
      <text:list text:style-name="L21">
        <text:list-item>
          <text:p text:style-name="P21">COMANDOS CLI EXIGIDOS</text:p>
        </text:list-item>
      </text:list>
      <text:p text:style-name="Text_20_body">La CLI debe implementarse con Python Fire.</text:p>
      <text:p text:style-name="Text_20_body">El subject exige al menos los siguientes comandos:</text:p>
      <text:p text:style-name="Horizontal_20_Line"/>
      <text:p text:style-name="Text_20_body">5.1. index</text:p>
      <text:p text:style-name="Text_20_body">Objetivo:</text:p>
      <text:p text:style-name="Text_20_body">Indexar el repositorio.</text:p>
      <text:p text:style-name="Text_20_body">Ejemplo:</text:p>
      <text:p text:style-name="Text_20_body"><text:soft-page-break/>uv run python -m student index --max_chunk_size 2000</text:p>
      <text:p text:style-name="Text_20_body">Responsabilidades:</text:p>
      <text:list text:style-name="L22">
        <text:list-item>
          <text:p text:style-name="P22">localizar archivos útiles;</text:p>
        </text:list-item>
        <text:list-item>
          <text:p text:style-name="P22">leer contenido;</text:p>
        </text:list-item>
        <text:list-item>
          <text:p text:style-name="P22">aplicar chunking;</text:p>
        </text:list-item>
        <text:list-item>
          <text:p text:style-name="P22">crear índice BM25 o TF-IDF;</text:p>
        </text:list-item>
        <text:list-item>
          <text:p text:style-name="P22">guardar chunks e índice en data/processed/;</text:p>
        </text:list-item>
        <text:list-item>
          <text:p text:style-name="P22">mostrar progreso si tarda;</text:p>
        </text:list-item>
        <text:list-item>
          <text:p text:style-name="P22">no superar 5 minutos de indexación.</text:p>
        </text:list-item>
      </text:list>
      <text:p text:style-name="Text_20_body">Salida esperada conceptual:</text:p>
      <text:p text:style-name="Text_20_body">Ingestion complete! Indices saved under data/processed/</text:p>
      <text:p text:style-name="Horizontal_20_Line"/>
      <text:p text:style-name="Text_20_body">5.2. search</text:p>
      <text:p text:style-name="Text_20_body">Objetivo:</text:p>
      <text:p text:style-name="Text_20_body">Buscar fuentes para una única pregunta.</text:p>
      <text:p text:style-name="Text_20_body">Ejemplo:</text:p>
      <text:p text:style-name="Text_20_body">uv run python -m student search "How to configure OpenAI server?" --k 10</text:p>
      <text:p text:style-name="Text_20_body">Responsabilidades:</text:p>
      <text:list text:style-name="L23">
        <text:list-item>
          <text:p text:style-name="P23">cargar índice;</text:p>
        </text:list-item>
        <text:list-item>
          <text:p text:style-name="P23">procesar query;</text:p>
        </text:list-item>
        <text:list-item>
          <text:p text:style-name="P23">recuperar top-k chunks;</text:p>
        </text:list-item>
        <text:list-item>
          <text:p text:style-name="P23">devolver fuentes con file_path, first_character_index y last_character_index.</text:p>
        </text:list-item>
      </text:list>
      <text:p text:style-name="Horizontal_20_Line"/>
      <text:p text:style-name="Text_20_body">5.3. search_dataset</text:p>
      <text:p text:style-name="Text_20_body">Objetivo:</text:p>
      <text:p text:style-name="Text_20_body">Procesar un dataset de preguntas sin responder y guardar resultados de búsqueda.</text:p>
      <text:p text:style-name="Text_20_body">Ejemplo:</text:p>
      <text:p text:style-name="Text_20_body">uv run python -m student search_dataset --dataset_path data/datasets/UnansweredQuestions/dataset_docs_public.json --k 10 --save_directory data/output/search_results</text:p>
      <text:p text:style-name="Text_20_body"><text:soft-page-break/>Responsabilidades:</text:p>
      <text:list text:style-name="L24">
        <text:list-item>
          <text:p text:style-name="P24">cargar dataset;</text:p>
        </text:list-item>
        <text:list-item>
          <text:p text:style-name="P24">validar formato con Pydantic;</text:p>
        </text:list-item>
        <text:list-item>
          <text:p text:style-name="P24">buscar top-k fuentes por cada pregunta;</text:p>
        </text:list-item>
        <text:list-item>
          <text:p text:style-name="P24">guardar JSON compatible con StudentSearchResults;</text:p>
        </text:list-item>
        <text:list-item>
          <text:p text:style-name="P24">preservar question_id;</text:p>
        </text:list-item>
        <text:list-item>
          <text:p text:style-name="P24">guardar el fichero en el directorio indicado.</text:p>
        </text:list-item>
      </text:list>
      <text:p text:style-name="Horizontal_20_Line"/>
      <text:p text:style-name="Text_20_body">5.4. answer</text:p>
      <text:p text:style-name="Text_20_body">Objetivo:</text:p>
      <text:p text:style-name="Text_20_body">Responder una única pregunta usando recuperación + LLM.</text:p>
      <text:p text:style-name="Text_20_body">Ejemplo:</text:p>
      <text:p text:style-name="Text_20_body">uv run python -m student answer "How to configure OpenAI server?" --k 10</text:p>
      <text:p text:style-name="Text_20_body">Responsabilidades:</text:p>
      <text:list text:style-name="L25">
        <text:list-item>
          <text:p text:style-name="P25">recuperar fuentes;</text:p>
        </text:list-item>
        <text:list-item>
          <text:p text:style-name="P25">construir contexto;</text:p>
        </text:list-item>
        <text:list-item>
          <text:p text:style-name="P25">llamar a Qwen/Qwen3-0.6B;</text:p>
        </text:list-item>
        <text:list-item>
          <text:p text:style-name="P25">generar respuesta fiel a las fuentes;</text:p>
        </text:list-item>
        <text:list-item>
          <text:p text:style-name="P25">devolver respuesta estructurada.</text:p>
        </text:list-item>
      </text:list>
      <text:p text:style-name="Horizontal_20_Line"/>
      <text:p text:style-name="Text_20_body">5.5. answer_dataset</text:p>
      <text:p text:style-name="Text_20_body">Objetivo:</text:p>
      <text:p text:style-name="Text_20_body">Generar respuestas para un conjunto de resultados de búsqueda.</text:p>
      <text:p text:style-name="Text_20_body">Ejemplo:</text:p>
      <text:p text:style-name="Text_20_body">uv run python -m student answer_dataset --student_search_results_path data/output/search_results/dataset_docs_public.json --save_directory data/output/search_results_and_answer</text:p>
      <text:p text:style-name="Text_20_body">Responsabilidades:</text:p>
      <text:list text:style-name="L26">
        <text:list-item>
          <text:p text:style-name="P26">cargar JSON de StudentSearchResults;</text:p>
        </text:list-item>
        <text:list-item>
          <text:p text:style-name="P26">para cada pregunta, recuperar o leer el contenido de las fuentes;</text:p>
        </text:list-item>
        <text:list-item>
          <text:p text:style-name="P26"><text:soft-page-break/>construir contexto;</text:p>
        </text:list-item>
        <text:list-item>
          <text:p text:style-name="P26">generar respuesta;</text:p>
        </text:list-item>
        <text:list-item>
          <text:p text:style-name="P26">guardar JSON compatible con StudentSearchResultsAndAnswer.</text:p>
        </text:list-item>
      </text:list>
      <text:p text:style-name="Horizontal_20_Line"/>
      <text:p text:style-name="Text_20_body">5.6. evaluate</text:p>
      <text:p text:style-name="Text_20_body">Objetivo:</text:p>
      <text:p text:style-name="Text_20_body">Evaluar resultados de búsqueda contra un dataset con ground truth.</text:p>
      <text:p text:style-name="Text_20_body">Ejemplo conceptual:</text:p>
      <text:p text:style-name="Text_20_body">uv run python -m student evaluate --student_answer_path data/output/search_results/dataset_docs_public.json --dataset_path data/datasets/AnsweredQuestions/dataset_docs_public.json --k 10</text:p>
      <text:p text:style-name="Text_20_body">Responsabilidades:</text:p>
      <text:list text:style-name="L27">
        <text:list-item>
          <text:p text:style-name="P27">cargar resultados del estudiante;</text:p>
        </text:list-item>
        <text:list-item>
          <text:p text:style-name="P27">cargar dataset con respuestas y fuentes correctas;</text:p>
        </text:list-item>
        <text:list-item>
          <text:p text:style-name="P27">comparar fuentes recuperadas contra fuentes correctas;</text:p>
        </text:list-item>
        <text:list-item>
          <text:p text:style-name="P27">aplicar regla de 5% mínimo de overlap;</text:p>
        </text:list-item>
        <text:list-item>
          <text:p text:style-name="P27">calcular recall@1, recall@3, recall@5, recall@10 u otros k relevantes;</text:p>
        </text:list-item>
        <text:list-item>
          <text:p text:style-name="P27">mostrar métricas detalladas.</text:p>
        </text:list-item>
      </text:list>
      <text:p text:style-name="Text_20_body">Aunque la moulinette tendrá su propio comando de evaluación, implementar evaluate ayuda a desarrollar y depurar el proyecto.</text:p>
      <text:p text:style-name="Text_20_body">============================================================</text:p>
      <text:list text:style-name="L28">
        <text:list-item>
          <text:p text:style-name="P28">ESTRUCTURA DE DATOS Y DIRECTORIOS RECOMENDADA</text:p>
        </text:list-item>
      </text:list>
      <text:p text:style-name="Text_20_body">Una estructura razonable para comenzar puede ser:</text:p>
      <text:p text:style-name="Text_20_body">data/<text:line-break/>raw/<text:line-break/>vllm-0.10.1/<text:line-break/>vllm-0.10.1.zip<text:line-break/>processed/<text:line-break/>chunks/<text:line-break/>bm25_index/<text:line-break/>datasets/<text:line-break/>AnsweredQuestions/<text:line-break/>dataset_code_public.json<text:line-break/>dataset_docs_public.json<text:line-break/><text:soft-page-break/>UnansweredQuestions/<text:line-break/>dataset_code_public.json<text:line-break/>dataset_docs_public.json<text:line-break/>output/<text:line-break/>search_results/<text:line-break/>search_results_and_answer/</text:p>
      <text:p text:style-name="Text_20_body">src/ o student/<text:line-break/><text:span text:style-name="Strong_20_Emphasis">main</text:span>.py<text:line-break/>cli.py<text:line-break/>models.py<text:line-break/>ingestion.py<text:line-break/>chunking.py<text:line-break/>indexing.py<text:line-break/>retrieval.py<text:line-break/>evaluation.py<text:line-break/>generation.py<text:line-break/>io_utils.py</text:p>
      <text:p text:style-name="Text_20_body">README.md<text:line-break/>Makefile<text:line-break/>pyproject.toml<text:line-break/>.gitignore</text:p>
      <text:p text:style-name="Text_20_body">El nombre exacto del paquete puede variar. Lo importante es que pueda ejecutarse con:</text:p>
      <text:p text:style-name="Text_20_body">uv run python -m student ...</text:p>
      <text:p text:style-name="Text_20_body">o con el nombre de módulo que el proyecto defina.</text:p>
      <text:p text:style-name="Text_20_body">============================================================</text:p>
      <text:list text:style-name="L29">
        <text:list-item>
          <text:p text:style-name="P29">RIESGOS PRINCIPALES DEL PROYECTO</text:p>
        </text:list-item>
      </text:list>
      <text:p text:style-name="Horizontal_20_Line"/>
      <text:p text:style-name="Text_20_body">7.1. Confundir RAG con un simple chatbot</text:p>
      <text:p text:style-name="Text_20_body">Este proyecto no consiste sólo en hacer que un modelo responda preguntas.</text:p>
      <text:p text:style-name="Text_20_body">El núcleo evaluable es:</text:p>
      <text:list text:style-name="L30">
        <text:list-item>
          <text:p text:style-name="P30">encontrar buenas fuentes;</text:p>
        </text:list-item>
        <text:list-item>
          <text:p text:style-name="P30">devolver coordenadas correctas;</text:p>
        </text:list-item>
        <text:list-item>
          <text:p text:style-name="P30">medir recall@k;</text:p>
        </text:list-item>
        <text:list-item>
          <text:p text:style-name="P30">generar respuestas basadas en esas fuentes.</text:p>
        </text:list-item>
      </text:list>
      <text:p text:style-name="Text_20_body"><text:soft-page-break/>Un chatbot que responde bien “de memoria” pero no recupera fuentes correctas no cumple el objetivo central del proyecto.</text:p>
      <text:p text:style-name="Horizontal_20_Line"/>
      <text:p text:style-name="Text_20_body">7.2. Empezar por el LLM demasiado pronto</text:p>
      <text:p text:style-name="Text_20_body">Por experiencia del proyecto Call me maybe, ya sabes trabajar con JSON, validación, CLI y modelos locales.</text:p>
      <text:p text:style-name="Text_20_body">En este proyecto, la parte nueva y más importante es retrieval.</text:p>
      <text:p text:style-name="Text_20_body">Por tanto, el orden correcto de desarrollo debería ser:</text:p>
      <text:list text:style-name="L31">
        <text:list-item>
          <text:p text:style-name="P31">modelos Pydantic;</text:p>
        </text:list-item>
        <text:list-item>
          <text:p text:style-name="P31">lectura de datasets;</text:p>
        </text:list-item>
        <text:list-item>
          <text:p text:style-name="P31">file discovery;</text:p>
        </text:list-item>
        <text:list-item>
          <text:p text:style-name="P31">chunking con offsets;</text:p>
        </text:list-item>
        <text:list-item>
          <text:p text:style-name="P31">índice BM25 o TF-IDF;</text:p>
        </text:list-item>
        <text:list-item>
          <text:p text:style-name="P31">search;</text:p>
        </text:list-item>
        <text:list-item>
          <text:p text:style-name="P31">evaluate;</text:p>
        </text:list-item>
        <text:list-item>
          <text:p text:style-name="P31">generación con Qwen.</text:p>
        </text:list-item>
      </text:list>
      <text:p text:style-name="Text_20_body">No conviene empezar por answer ni por prompt engineering.</text:p>
      <text:p text:style-name="Horizontal_20_Line"/>
      <text:p text:style-name="Text_20_body">7.3. Perder los offsets durante el chunking</text:p>
      <text:p text:style-name="Text_20_body">Este es uno de los riesgos técnicos más importantes.</text:p>
      <text:p text:style-name="Text_20_body">No basta con guardar el texto del chunk. Hay que guardar de forma exacta:</text:p>
      <text:list text:style-name="L32">
        <text:list-item>
          <text:p text:style-name="P32">archivo;</text:p>
        </text:list-item>
        <text:list-item>
          <text:p text:style-name="P32">índice inicial;</text:p>
        </text:list-item>
        <text:list-item>
          <text:p text:style-name="P32">índice final.</text:p>
        </text:list-item>
      </text:list>
      <text:p text:style-name="Text_20_body">Si los índices no coinciden con el contenido real del archivo, el sistema puede recuperar información correcta pero fallar la evaluación de fuentes.</text:p>
      <text:p text:style-name="Text_20_body">Regla práctica:</text:p>
      <text:p text:style-name="Text_20_body">Cada chunk debe poder verificarse así:</text:p>
      <text:p text:style-name="Text_20_body">chunk.content == original_file_text[chunk.first_character_index:chunk.last_character_index]</text:p>
      <text:p text:style-name="Horizontal_20_Line"/>
      <text:p text:style-name="Text_20_body">7.4. Crear chunks demasiado grandes o demasiado pequeños</text:p>
      <text:p text:style-name="Text_20_body"><text:soft-page-break/>Chunks demasiado grandes:</text:p>
      <text:list text:style-name="L33">
        <text:list-item>
          <text:p text:style-name="P33">meten demasiado ruido;</text:p>
        </text:list-item>
        <text:list-item>
          <text:p text:style-name="P33">reducen precisión;</text:p>
        </text:list-item>
        <text:list-item>
          <text:p text:style-name="P33">consumen demasiado contexto;</text:p>
        </text:list-item>
        <text:list-item>
          <text:p text:style-name="P33">pueden dificultar el ranking.</text:p>
        </text:list-item>
      </text:list>
      <text:p text:style-name="Text_20_body">Chunks demasiado pequeños:</text:p>
      <text:list text:style-name="L34">
        <text:list-item>
          <text:p text:style-name="P34">pierden contexto;</text:p>
        </text:list-item>
        <text:list-item>
          <text:p text:style-name="P34">separan funciones de sus comentarios;</text:p>
        </text:list-item>
        <text:list-item>
          <text:p text:style-name="P34">separan headings de su explicación;</text:p>
        </text:list-item>
        <text:list-item>
          <text:p text:style-name="P34">pueden bajar recall si la fuente esperada cubre un bloque mayor.</text:p>
        </text:list-item>
      </text:list>
      <text:p text:style-name="Text_20_body">El límite máximo es 2000 caracteres, pero no significa que todos los chunks deban medir exactamente 2000.</text:p>
      <text:p text:style-name="Horizontal_20_Line"/>
      <text:p text:style-name="Text_20_body">7.5. Indexar archivos inútiles</text:p>
      <text:p text:style-name="Text_20_body">Si se indexa todo sin criterio, el índice se llena de ruido.</text:p>
      <text:p text:style-name="Text_20_body">Eso puede empeorar el ranking.</text:p>
      <text:p text:style-name="Text_20_body">Hay que filtrar archivos irrelevantes y documentar la decisión.</text:p>
      <text:p text:style-name="Text_20_body">Ejemplos de ruido:</text:p>
      <text:list text:style-name="L35">
        <text:list-item>
          <text:p text:style-name="P35">archivos binarios;</text:p>
        </text:list-item>
        <text:list-item>
          <text:p text:style-name="P35">cachés;</text:p>
        </text:list-item>
        <text:list-item>
          <text:p text:style-name="P35">lock files enormes;</text:p>
        </text:list-item>
        <text:list-item>
          <text:p text:style-name="P35">assets;</text:p>
        </text:list-item>
        <text:list-item>
          <text:p text:style-name="P35">outputs generados;</text:p>
        </text:list-item>
        <text:list-item>
          <text:p text:style-name="P35">carpetas internas no relevantes.</text:p>
        </text:list-item>
      </text:list>
      <text:p text:style-name="Horizontal_20_Line"/>
      <text:p text:style-name="Text_20_body">7.6. No preservar question_id</text:p>
      <text:p text:style-name="Text_20_body">Los datasets usan question_id.</text:p>
      <text:p text:style-name="Text_20_body">Al procesar search_dataset o answer_dataset, el sistema debe conservar el question_id original.</text:p>
      <text:p text:style-name="Text_20_body">Si se regenera o se pierde, la comparación con el ground truth puede fallar o complicarse.</text:p>
      <text:p text:style-name="Horizontal_20_Line"/>
      <text:p text:style-name="Text_20_body"><text:soft-page-break/>7.7. Devolver JSON no compatible</text:p>
      <text:p text:style-name="Text_20_body">El output puede tener campos extra, pero debe respetar la base mínima del subject.</text:p>
      <text:p text:style-name="Text_20_body">Riesgo:</text:p>
      <text:list text:style-name="L36">
        <text:list-item>
          <text:p text:style-name="P36">cambiar nombres de campos;</text:p>
        </text:list-item>
        <text:list-item>
          <text:p text:style-name="P36">omitir k;</text:p>
        </text:list-item>
        <text:list-item>
          <text:p text:style-name="P36">omitir question;</text:p>
        </text:list-item>
        <text:list-item>
          <text:p text:style-name="P36">omitir retrieved_sources;</text:p>
        </text:list-item>
        <text:list-item>
          <text:p text:style-name="P36">usar strings donde deben ir ints;</text:p>
        </text:list-item>
        <text:list-item>
          <text:p text:style-name="P36">devolver un diccionario cuando se espera una lista;</text:p>
        </text:list-item>
        <text:list-item>
          <text:p text:style-name="P36">no validar con Pydantic antes de guardar.</text:p>
        </text:list-item>
      </text:list>
      <text:p text:style-name="Text_20_body">Todo JSON final debería validarse con los modelos antes de escribirse.</text:p>
      <text:p text:style-name="Horizontal_20_Line"/>
      <text:p text:style-name="Text_20_body">7.8. No controlar rendimiento</text:p>
      <text:p text:style-name="Text_20_body">El subject define límites de rendimiento.</text:p>
      <text:p text:style-name="Text_20_body">Riesgos:</text:p>
      <text:list text:style-name="L37">
        <text:list-item>
          <text:p text:style-name="P37">indexar desde cero en cada búsqueda;</text:p>
        </text:list-item>
        <text:list-item>
          <text:p text:style-name="P37">cargar el LLM innecesariamente durante search;</text:p>
        </text:list-item>
        <text:list-item>
          <text:p text:style-name="P37">usar estructuras lentas;</text:p>
        </text:list-item>
        <text:list-item>
          <text:p text:style-name="P37">guardar chunks de forma ineficiente;</text:p>
        </text:list-item>
        <text:list-item>
          <text:p text:style-name="P37">no separar retrieval de generation.</text:p>
        </text:list-item>
      </text:list>
      <text:p text:style-name="Text_20_body">Search debería poder funcionar sin cargar Qwen.</text:p>
      <text:p text:style-name="Text_20_body">El LLM sólo debería cargarse para answer o answer_dataset.</text:p>
      <text:p text:style-name="Horizontal_20_Line"/>
      <text:p text:style-name="Text_20_body">7.9. Alucinaciones en la generación</text:p>
      <text:p text:style-name="Text_20_body">El LLM puede responder con información no presente en las fuentes.</text:p>
      <text:p text:style-name="Text_20_body">Para reducir este riesgo:</text:p>
      <text:list text:style-name="L38">
        <text:list-item>
          <text:p text:style-name="P38">pasar contexto claro;</text:p>
        </text:list-item>
        <text:list-item>
          <text:p text:style-name="P38">pedir que responda sólo con información recuperada;</text:p>
        </text:list-item>
        <text:list-item>
          <text:p text:style-name="P38">indicar que no invente si el contexto no contiene respuesta;</text:p>
        </text:list-item>
        <text:list-item>
          <text:p text:style-name="P38">limitar contexto a fuentes relevantes;</text:p>
        </text:list-item>
        <text:list-item>
          <text:p text:style-name="P38"><text:soft-page-break/>no mezclar demasiados chunks de baja calidad.</text:p>
        </text:list-item>
      </text:list>
      <text:p text:style-name="Text_20_body">Aun así, la prioridad inicial debe ser retrieval, no generación.</text:p>
      <text:p text:style-name="Horizontal_20_Line"/>
      <text:p text:style-name="Text_20_body">7.10. No medir desde el principio</text:p>
      <text:p text:style-name="Text_20_body">El subject insiste en empezar simple y medir el error.</text:p>
      <text:p text:style-name="Text_20_body">Si no implementas evaluate pronto, estarás desarrollando a ciegas.</text:p>
      <text:p text:style-name="Text_20_body">Debe existir una forma local de comprobar:</text:p>
      <text:list text:style-name="L39">
        <text:list-item>
          <text:p text:style-name="P39">recall@1;</text:p>
        </text:list-item>
        <text:list-item>
          <text:p text:style-name="P39">recall@3;</text:p>
        </text:list-item>
        <text:list-item>
          <text:p text:style-name="P39">recall@5;</text:p>
        </text:list-item>
        <text:list-item>
          <text:p text:style-name="P39">recall@10;</text:p>
        </text:list-item>
        <text:list-item>
          <text:p text:style-name="P39">diferencias entre docs y code;</text:p>
        </text:list-item>
        <text:list-item>
          <text:p text:style-name="P39">preguntas que fallan;</text:p>
        </text:list-item>
        <text:list-item>
          <text:p text:style-name="P39">fuentes correctas no encontradas.</text:p>
        </text:list-item>
      </text:list>
      <text:p text:style-name="Text_20_body">============================================================</text:p>
      <text:list text:style-name="L40">
        <text:list-item>
          <text:p text:style-name="P40">PLAN MENTAL PARA EMPEZAR A PROGRAMAR</text:p>
        </text:list-item>
      </text:list>
      <text:p text:style-name="Text_20_body">El primer objetivo no debe ser completar todo el proyecto.</text:p>
      <text:p text:style-name="Text_20_body">El primer objetivo debe ser conseguir este flujo mínimo:</text:p>
      <text:list text:style-name="L41">
        <text:list-item>
          <text:p text:style-name="P41">Leer dataset UnansweredQuestions.</text:p>
        </text:list-item>
        <text:list-item>
          <text:p text:style-name="P41">Leer archivos útiles del repositorio.</text:p>
        </text:list-item>
        <text:list-item>
          <text:p text:style-name="P41">Crear chunks con offsets correctos.</text:p>
        </text:list-item>
        <text:list-item>
          <text:p text:style-name="P41">Crear índice BM25 o TF-IDF.</text:p>
        </text:list-item>
        <text:list-item>
          <text:p text:style-name="P41">Ejecutar search_dataset.</text:p>
        </text:list-item>
        <text:list-item>
          <text:p text:style-name="P41">Guardar StudentSearchResults.</text:p>
        </text:list-item>
        <text:list-item>
          <text:p text:style-name="P41">Ejecutar evaluate contra AnsweredQuestions.</text:p>
        </text:list-item>
        <text:list-item>
          <text:p text:style-name="P41">Ver recall@5.</text:p>
        </text:list-item>
      </text:list>
      <text:p text:style-name="Text_20_body">Sólo después tiene sentido añadir answer y answer_dataset.</text:p>
      <text:p text:style-name="Text_20_body">Versión mínima funcional del proyecto:</text:p>
      <text:p text:style-name="Text_20_body">raw vLLM repo<text:line-break/>→ file discovery<text:line-break/><text:soft-page-break/>→ chunking<text:line-break/>→ BM25/TF-IDF index<text:line-break/>→ search_dataset<text:line-break/>→ StudentSearchResults JSON<text:line-break/>→ evaluate recall@k</text:p>
      <text:p text:style-name="Text_20_body">Versión completa:</text:p>
      <text:p text:style-name="Text_20_body">raw vLLM repo<text:line-break/>→ file discovery<text:line-break/>→ chunking<text:line-break/>→ index<text:line-break/>→ search<text:line-break/>→ JSON search results<text:line-break/>→ evaluation recall@k<text:line-break/>→ answer generation with Qwen/Qwen3-0.6B<text:line-break/>→ JSON answers</text:p>
      <text:p text:style-name="Text_20_body">============================================================</text:p>
      <text:list text:style-name="L42">
        <text:list-item>
          <text:p text:style-name="P42">CRITERIO DE ÉXITO PARA LA PRIMERA FASE</text:p>
        </text:list-item>
      </text:list>
      <text:p text:style-name="Text_20_body">Puedes considerar que la primera fase del proyecto está bien encaminada cuando puedas responder afirmativamente a estas preguntas:</text:p>
      <text:p text:style-name="Text_20_body">¿Puedo cargar los datasets con Pydantic?</text:p>
      <text:p text:style-name="Text_20_body">¿Puedo recorrer el repositorio vLLM y seleccionar archivos útiles?</text:p>
      <text:p text:style-name="Text_20_body">¿Puedo crear chunks de máximo 2000 caracteres?</text:p>
      <text:p text:style-name="Text_20_body">¿Cada chunk mantiene offsets exactos?</text:p>
      <text:p text:style-name="Text_20_body">¿Puedo reconstruir el texto de un chunk usando los índices guardados?</text:p>
      <text:p text:style-name="Text_20_body">¿Puedo construir un índice BM25 o TF-IDF?</text:p>
      <text:p text:style-name="Text_20_body">¿Puedo buscar una pregunta y obtener top-k fuentes?</text:p>
      <text:p text:style-name="Text_20_body">¿Puedo guardar resultados en formato StudentSearchResults?</text:p>
      <text:p text:style-name="Text_20_body">¿Puedo comparar mis fuentes contra el ground truth?</text:p>
      <text:p text:style-name="Text_20_body">¿Puedo calcular recall@5?</text:p>
      <text:p text:style-name="Text_20_body">Si todo eso funciona, ya tienes la parte más importante del proyecto en marcha.</text:p>
      <text:p text:style-name="Text_20_body">============================================================</text:p>
      <text:list text:style-name="L43">
        <text:list-item>
          <text:p text:style-name="P43">RESUMEN FINAL</text:p>
        </text:list-item>
      </text:list>
      <text:p text:style-name="Text_20_body">Este proyecto no debe abordarse como “hacer que una IA responda preguntas”.</text:p>
      <text:p text:style-name="Text_20_body">Debe abordarse como un sistema evaluable de recuperación y generación:</text:p>
      <text:list text:style-name="L44">
        <text:list-item>
          <text:p text:style-name="P44"><text:soft-page-break/>Preparar una base de conocimiento desde el repositorio vLLM.</text:p>
        </text:list-item>
        <text:list-item>
          <text:p text:style-name="P44">Dividir archivos en chunks con coordenadas exactas.</text:p>
        </text:list-item>
        <text:list-item>
          <text:p text:style-name="P44">Indexar esos chunks con BM25 o TF-IDF.</text:p>
        </text:list-item>
        <text:list-item>
          <text:p text:style-name="P44">Recuperar top-k fuentes para cada pregunta.</text:p>
        </text:list-item>
        <text:list-item>
          <text:p text:style-name="P44">Guardar resultados en JSON compatible con Pydantic.</text:p>
        </text:list-item>
        <text:list-item>
          <text:p text:style-name="P44">Medir recall@k.</text:p>
        </text:list-item>
        <text:list-item>
          <text:p text:style-name="P44">Usar Qwen/Qwen3-0.6B para generar respuestas sólo después de tener un retrieval razonable.</text:p>
        </text:list-item>
      </text:list>
      <text:p text:style-name="Text_20_body">La prioridad técnica inicial es:</text:p>
      <text:p text:style-name="Text_20_body">correct JSON models</text:p>
      <text:list text:style-name="L45">
        <text:list-item>
          <text:p text:style-name="P45">correct chunk offsets</text:p>
        </text:list-item>
        <text:list-item>
          <text:p text:style-name="P45">working retrieval</text:p>
        </text:list-item>
        <text:list-item>
          <text:p text:style-name="P45">measurable recall@k</text:p>
        </text:list-item>
      </text:list>
      <text:p text:style-name="Text_20_body">La generación con LLM debe venir despué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2T09:21:14.283856264</meta:creation-date>
    <dc:date>2026-05-12T09:23:40.976805320</dc:date>
    <meta:editing-duration>PT2M27S</meta:editing-duration>
    <meta:editing-cycles>1</meta:editing-cycles>
    <meta:document-statistic meta:table-count="0" meta:image-count="0" meta:object-count="0" meta:page-count="29" meta:paragraph-count="602" meta:word-count="4325" meta:character-count="30830" meta:non-whitespace-character-count="27317"/>
    <meta:generator>LibreOffice/25.2.3.2$Linux_X86_64 LibreOffice_project/520$Build-2</meta:generator>
  </office:meta>
</office:document-meta>
</file>