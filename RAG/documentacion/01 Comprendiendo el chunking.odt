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OpenSymbol" svg:font-family="OpenSymbol" style:font-charset="x-symbol"/>
  </office:font-face-decls>
  <office:automatic-styles>
    <style:style style:name="P1" style:family="paragraph" style:parent-style-name="Standard">
      <style:paragraph-properties fo:margin-left="0.4925in" fo:text-indent="0in" style:auto-text-indent="false"/>
    </style:style>
    <style:style style:name="P2" style:family="paragraph" style:parent-style-name="Standard">
      <style:paragraph-properties fo:margin-left="0.4925in" fo:text-indent="0in" style:auto-text-indent="false"/>
      <style:text-properties officeooo:paragraph-rsid="0001a6e7"/>
    </style:style>
    <style:style style:name="P3" style:family="paragraph" style:parent-style-name="Standard">
      <style:paragraph-properties fo:margin-left="0in" fo:text-indent="0in" style:auto-text-indent="false"/>
      <style:text-properties officeooo:paragraph-rsid="0001a6e7"/>
    </style:style>
    <style:style style:name="P4" style:family="paragraph" style:parent-style-name="Text_20_body">
      <style:paragraph-properties fo:margin-left="0in" fo:text-indent="0in" style:auto-text-indent="false"/>
      <style:text-properties officeooo:paragraph-rsid="0001a6e7"/>
    </style:style>
    <style:style style:name="P5" style:family="paragraph" style:parent-style-name="Standard">
      <style:paragraph-properties fo:margin-left="0in" fo:text-indent="0in" style:auto-text-indent="false"/>
      <style:text-properties officeooo:rsid="0001a6e7" officeooo:paragraph-rsid="0001a6e7"/>
    </style:style>
    <style:style style:name="P6" style:family="paragraph" style:parent-style-name="Standard">
      <style:paragraph-properties fo:margin-left="0in" fo:text-indent="0in" style:auto-text-indent="false"/>
      <style:text-properties officeooo:rsid="000562d7" officeooo:paragraph-rsid="000562d7"/>
    </style:style>
    <style:style style:name="P7" style:family="paragraph" style:parent-style-name="Standard">
      <style:paragraph-properties fo:margin-left="0.4925in" fo:text-indent="0in" style:auto-text-indent="false"/>
      <style:text-properties style:font-name="Noto Mono" officeooo:rsid="000562d7" officeooo:paragraph-rsid="000562d7"/>
    </style:style>
    <style:style style:name="P8" style:family="paragraph" style:parent-style-name="Standard">
      <style:paragraph-properties fo:margin-left="0.4925in" fo:text-indent="0in" style:auto-text-indent="false"/>
      <style:text-properties officeooo:rsid="000562d7" officeooo:paragraph-rsid="000562d7"/>
    </style:style>
    <style:style style:name="P9" style:family="paragraph" style:parent-style-name="Standard">
      <style:paragraph-properties fo:margin-left="0.4925in" fo:text-indent="0in" style:auto-text-indent="false"/>
      <style:text-properties officeooo:rsid="000562d7" officeooo:paragraph-rsid="0006d64e"/>
    </style:style>
    <style:style style:name="P10" style:family="paragraph" style:parent-style-name="Standard">
      <style:paragraph-properties fo:margin-left="0.4925in" fo:text-indent="0in" style:auto-text-indent="false"/>
      <style:text-properties officeooo:rsid="0006d64e" officeooo:paragraph-rsid="0006d64e"/>
    </style:style>
    <style:style style:name="P11" style:family="paragraph" style:parent-style-name="Text_20_body">
      <style:text-properties officeooo:rsid="00036e9a" officeooo:paragraph-rsid="00036e9a"/>
    </style:style>
    <style:style style:name="P12" style:family="paragraph" style:parent-style-name="Text_20_body">
      <style:paragraph-properties fo:margin-left="0.4925in" fo:text-indent="0in" style:auto-text-indent="false"/>
    </style:style>
    <style:style style:name="P13" style:family="paragraph" style:parent-style-name="Text_20_body">
      <style:paragraph-properties fo:margin-left="0.4925in" fo:text-indent="0in" style:auto-text-indent="false"/>
      <style:text-properties officeooo:rsid="00036e9a" officeooo:paragraph-rsid="00036e9a"/>
    </style:style>
    <style:style style:name="P14" style:family="paragraph" style:parent-style-name="Text_20_body">
      <style:text-properties officeooo:rsid="000562d7" officeooo:paragraph-rsid="000562d7"/>
    </style:style>
    <style:style style:name="P15" style:family="paragraph" style:parent-style-name="Text_20_body">
      <style:paragraph-properties fo:margin-left="0.4925in" fo:text-indent="0in" style:auto-text-indent="false"/>
      <style:text-properties officeooo:rsid="000562d7" officeooo:paragraph-rsid="000562d7"/>
    </style:style>
    <style:style style:name="P16" style:family="paragraph" style:parent-style-name="Heading_20_1">
      <style:text-properties officeooo:rsid="00075df9" officeooo:paragraph-rsid="00075df9"/>
    </style:style>
    <style:style style:name="P17" style:family="paragraph" style:parent-style-name="Text_20_body">
      <style:text-properties officeooo:paragraph-rsid="00075df9"/>
    </style:style>
    <style:style style:name="P18" style:family="paragraph" style:parent-style-name="Heading_20_2">
      <style:text-properties officeooo:rsid="00075df9" officeooo:paragraph-rsid="00075df9"/>
    </style:style>
    <style:style style:name="P19" style:family="paragraph" style:parent-style-name="Text_20_body">
      <style:paragraph-properties fo:margin-left="0.4925in" fo:text-indent="0in" style:auto-text-indent="false"/>
      <style:text-properties officeooo:paragraph-rsid="00075df9"/>
    </style:style>
    <style:style style:name="P20" style:family="paragraph" style:parent-style-name="Text_20_body">
      <style:text-properties officeooo:rsid="00082ee5" officeooo:paragraph-rsid="00082ee5"/>
    </style:style>
    <style:style style:name="P21" style:family="paragraph" style:parent-style-name="Text_20_body">
      <style:paragraph-properties fo:margin-left="0.4925in" fo:text-indent="0in" style:auto-text-indent="false"/>
      <style:text-properties officeooo:rsid="00082ee5" officeooo:paragraph-rsid="00082ee5"/>
    </style:style>
    <style:style style:name="P22" style:family="paragraph" style:parent-style-name="Text_20_body">
      <style:paragraph-properties fo:margin-left="0in" fo:text-indent="0in" style:auto-text-indent="false"/>
      <style:text-properties officeooo:rsid="0008f308" officeooo:paragraph-rsid="0008f308"/>
    </style:style>
    <style:style style:name="T1" style:family="text">
      <style:text-properties officeooo:rsid="000562d7"/>
    </style:style>
    <style:style style:name="T2" style:family="text">
      <style:text-properties officeooo:rsid="00075d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Dado un archivo de texto, ¿puedo partirlo en trozos útiles sin perder la posición exacta de cada trozo dentro del archivo original?</text:span></text:p>
      <text:p text:style-name="Text_20_body">Eso es el chunking con coordenadas.</text:p>
      <text:p text:style-name="Text_20_body">El repositorio vLLM es demasiado grande para pasárselo entero al LLM.</text:p>
      <text:p text:style-name="Text_20_body">Por tanto, tu programa tiene que hacer esto:</text:p>
      <text:p text:style-name="P1">archivo completo</text:p>
      <text:p text:style-name="P1">→ fragmentos pequeños</text:p>
      <text:p text:style-name="P1">→ cada fragmento conserva su ruta y su posición exacta</text:p>
      <text:p text:style-name="P1">→ esos fragmentos se indexan</text:p>
      <text:p text:style-name="P2">→ luego el buscador devuelve los fragmentos más relevantes</text:p>
      <text:p text:style-name="P3"/>
      <text:p text:style-name="P4">Cada fragmento se llama <text:span text:style-name="Strong_20_Emphasis">chunk</text:span>.</text:p>
      <text:p text:style-name="Text_20_body">Un chunk no es sólo texto. Un chunk debe poder decir:</text:p>
      <text:p text:style-name="P2">Este texto viene del archivo X,</text:p>
      <text:p text:style-name="P2">empieza en el carácter N,</text:p>
      <text:p text:style-name="P2">termina en el carácter M.</text:p>
      <text:p text:style-name="P3"/>
      <text:p text:style-name="P5">Ejemplo:</text:p>
      <text:p text:style-name="P2">Texto completo:</text:p>
      <text:p text:style-name="P2">"hello world"</text:p>
      <text:p text:style-name="P2"/>
      <text:p text:style-name="P2">Chunk:</text:p>
      <text:p text:style-name="P2">"world"</text:p>
      <text:p text:style-name="P2"/>
      <text:p text:style-name="P2">Coordenadas:</text:p>
      <text:p text:style-name="P2">first_character_index = 6</text:p>
      <text:p text:style-name="P2">last_character_index = 11</text:p>
      <text:p text:style-name="P2"/>
      <text:p text:style-name="P6">Ten en cuenta que, en python:</text:p>
      <text:p text:style-name="P6"/>
      <text:p text:style-name="P7">h <text:s/>e <text:s/>l <text:s/>l <text:s/>o <text:s text:c="4"/>w <text:s/>o <text:s/>r <text:s/>l <text:s/>d</text:p>
      <text:p text:style-name="P7">0 <text:s/>1 <text:s/>2 <text:s/>3 <text:s/>4 <text:s/>5 <text:s/>6 <text:s/>7 <text:s/>8 <text:s/>9 <text:s/>10</text:p>
      <text:p text:style-name="P7"/>
      <text:p text:style-name="P1">Para representar “hello”</text:p>
      <text:p text:style-name="P1"/>
      <text:p text:style-name="P1">first_character_index = 0</text:p>
      <text:p text:style-name="P1">last_character_index = 5</text:p>
      <text:p text:style-name="P8"/>
      <text:p text:style-name="P9">El último carácter está EXCLUÍDO. </text:p>
      <text:p text:style-name="P10"/>
      <text:p text:style-name="P10">Esto facilita: longitud_del_chunk = last_character_index - first_character_index</text:p>
      <text:h text:style-name="Heading_20_1" text:outline-level="1">Primer tipo de chunking: texto Markdown</text:h>
      <text:p text:style-name="P11">El subject dice que debes hacer un troceado inteligente de ficheros markdown.</text:p>
      <text:p text:style-name="P11"><text:soft-page-break/><text:span text:style-name="T1">overlap</text:span>: tiene sentido que los chunk se solapen, que el final de uno y el comienzo del otro tengan parte común. Esto puede mejorar la respuesta de la IA. P.e. que los 50 caracteres finales de un chunk sean iguales alos 50 primeros del siguiente. El problema es que esto tal vez dificulte las referencias. <text:span text:style-name="T1">Podría ser un valor configurable para ir probando.</text:span></text:p>
      <text:p text:style-name="Text_20_body">Un archivo Markdown suele tener:</text:p>
      <text:p text:style-name="P12"># títulos</text:p>
      <text:p text:style-name="P12">## subtítulos</text:p>
      <text:p text:style-name="P12">párrafos</text:p>
      <text:p text:style-name="P12">listas</text:p>
      <text:p text:style-name="P12">bloques de código</text:p>
      <text:p text:style-name="P11">La estrategia puede ser: </text:p>
      <text:p text:style-name="P13">1. Separar por secciones Markdown.</text:p>
      <text:p text:style-name="P13">2. Intentar que cada sección sea un chunk.</text:p>
      <text:p text:style-name="P13">3. Si una sección supera 2000 caracteres, partirla por párrafos.</text:p>
      <text:p text:style-name="P13">4. Si un párrafo supera 2000 caracteres, partirlo por tamaño fijo.</text:p>
      <text:h text:style-name="Heading_20_1" text:outline-level="1">Segundo tipo de chunking: código Python</text:h>
      <text:p text:style-name="Text_20_body">Un archivo Python suele tener:</text:p>
      <text:p text:style-name="P12">imports</text:p>
      <text:p text:style-name="P12">constantes</text:p>
      <text:p text:style-name="P12">funciones</text:p>
      <text:p text:style-name="P12">clases</text:p>
      <text:p text:style-name="P12">métodos</text:p>
      <text:p text:style-name="P14">La estrategía podría ser:</text:p>
      <text:p text:style-name="P14"><text:tab/>1. Detectar funciones y clases.</text:p>
      <text:p text:style-name="P15">2. Crear chunks por función o clase.</text:p>
      <text:p text:style-name="P15">3. Si una clase es muy grande, dividir por métodos.</text:p>
      <text:p text:style-name="P15">4. Si un bloque sigue siendo mayor de 2000 caracteres, partirlo por tamaño fijo.</text:p>
      <text:p text:style-name="P15">5. Si el archivo no se puede analizar bien, usar fallback por líneas o tamaño.</text:p>
      <text:h text:style-name="P16" text:outline-level="1"><text:soft-page-break/>Tarea 1:</text:h>
      <text:p text:style-name="P17"><text:span text:style-name="T2">Crea </text:span>src/chunking.py <text:span text:style-name="T2">con:</text:span></text:p>
      <text:h text:style-name="P18" text:outline-level="2">Una estructura simple para representar un chunk</text:h>
      <text:p text:style-name="Text_20_body">Por ahora puede ser una <text:span text:style-name="Source_20_Text">dataclass</text:span>, no Pydantic.</text:p>
      <text:p text:style-name="Text_20_body">Debe guardar:</text:p>
      <text:p text:style-name="P19">file_path</text:p>
      <text:p text:style-name="P19">first_character_index</text:p>
      <text:p text:style-name="P19">last_character_index</text:p>
      <text:p text:style-name="P19">content</text:p>
      <text:h text:style-name="Heading_20_2" text:outline-level="2">Una función de chunking fijo</text:h>
      <text:p text:style-name="P17">Debe recibir:</text:p>
      <text:p text:style-name="P19">file_path</text:p>
      <text:p text:style-name="P19">text</text:p>
      <text:p text:style-name="P19">max_chunk_size</text:p>
      <text:p text:style-name="P17">Debe devolver una lista de chunks, <text:span text:style-name="T2">considerando:</text:span></text:p>
      <text:p text:style-name="P19">Si max_chunk_size &lt;= 0, debe tratarse como error.</text:p>
      <text:p text:style-name="P19">Ningún chunk puede superar max_chunk_size.</text:p>
      <text:p text:style-name="P19">No debe perder caracteres.</text:p>
      <text:p text:style-name="P19">No debe duplicar caracteres.</text:p>
      <text:p text:style-name="P19">No debe modificar el texto original.</text:p>
      <text:p text:style-name="P19">Si text está vacío, debe devolver una lista vacía.</text:p>
      <text:h text:style-name="Heading_20_1" text:outline-level="1">Una función de validación</text:h>
      <text:p text:style-name="P20">Debe recibir</text:p>
      <text:p text:style-name="P21">original_text</text:p>
      <text:p text:style-name="P21">chunks</text:p>
      <text:p text:style-name="P20">Debe comprobar que cada chunk cumple:</text:p>
      <text:p text:style-name="P21">first_character_index &gt;= 0</text:p>
      <text:p text:style-name="P21"><text:soft-page-break/>last_character_index &gt; first_character_index</text:p>
      <text:p text:style-name="P21">last_character_index &lt;= len(original_text)</text:p>
      <text:p text:style-name="P21">len(content) &lt;= max_chunk_size</text:p>
      <text:p text:style-name="P21">content == original_text[first_character_index:last_character_index]</text:p>
      <text:p text:style-name="P22">Al tinal tendrás una función que divide texto en chunks de tamaño fijo.</text:p>
      <text:p text:style-name="P22">Cada chunk conserva file_path, first_character_index, last_character_index y content.</text:p>
      <text:p text:style-name="P22">Podrás validar que cada content coincide exactamente con original_text[start:end].</text:p>
      <text:p text:style-name="P22">No pierde caracteres.</text:p>
      <text:p text:style-name="P22">No duplicas caracteres.</text:p>
      <text:p text:style-name="P22">No superas max_chunk_size.</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2T09:28:07.729772080</meta:creation-date>
    <dc:date>2026-05-12T10:00:25.766532411</dc:date>
    <meta:editing-duration>PT20M23S</meta:editing-duration>
    <meta:editing-cycles>7</meta:editing-cycles>
    <meta:generator>LibreOffice/25.2.3.2$Linux_X86_64 LibreOffice_project/520$Build-2</meta:generator>
    <meta:document-statistic meta:table-count="0" meta:image-count="0" meta:object-count="0" meta:page-count="4" meta:paragraph-count="94" meta:word-count="521" meta:character-count="3362" meta:non-whitespace-character-count="2910"/>
  </office:meta>
</office:document-meta>
</file>