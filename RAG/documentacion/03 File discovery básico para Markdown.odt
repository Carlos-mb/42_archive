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40b5c"/>
    </style:style>
    <style:style style:name="P2" style:family="paragraph" style:parent-style-name="Text_20_body">
      <style:text-properties officeooo:paragraph-rsid="0013e0e7"/>
    </style:style>
    <style:style style:name="P3" style:family="paragraph" style:parent-style-name="Text_20_body">
      <style:text-properties fo:font-weight="bold" officeooo:paragraph-rsid="0013e0e7" style:font-weight-asian="bold" style:font-weight-complex="bold"/>
    </style:style>
    <style:style style:name="P4" style:family="paragraph" style:parent-style-name="Text_20_body">
      <style:text-properties fo:font-weight="bold" officeooo:paragraph-rsid="00140545" style:font-weight-asian="bold" style:font-weight-complex="bold"/>
    </style:style>
    <style:style style:name="P5" style:family="paragraph" style:parent-style-name="Text_20_body">
      <style:text-properties fo:font-weight="bold" officeooo:paragraph-rsid="00140b5c" style:font-weight-asian="bold" style:font-weight-complex="bold"/>
    </style:style>
    <style:style style:name="P6" style:family="paragraph" style:parent-style-name="Text_20_body">
      <style:text-properties fo:font-weight="bold" officeooo:rsid="00140b5c" officeooo:paragraph-rsid="00140b5c" style:font-weight-asian="bold" style:font-weight-complex="bold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text-properties officeooo:paragraph-rsid="00140545"/>
    </style:style>
    <style:style style:name="P9" style:family="paragraph" style:parent-style-name="Text_20_body">
      <style:text-properties officeooo:rsid="00140545" officeooo:paragraph-rsid="00140545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2">
      <style:text-properties officeooo:paragraph-rsid="00140b5c"/>
    </style:style>
    <style:style style:name="P13" style:family="paragraph" style:parent-style-name="Text_20_body" style:list-style-name="L3"/>
    <style:style style:name="T1" style:family="text">
      <style:text-properties officeooo:rsid="0013e0e7"/>
    </style:style>
    <style:style style:name="T2" style:family="text">
      <style:text-properties officeooo:rsid="00140545"/>
    </style:style>
    <style:style style:name="T3" style:family="text">
      <style:text-properties officeooo:rsid="00140b5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FILE DISCOVERY BÁSICO PARA MARKDOWN</text:p>
      <text:p text:style-name="Text_20_body">Objetivo de la tarea</text:p>
      <text:p text:style-name="Text_20_body">Implementar una primera fase de ingesta de documentación Markdown.</text:p>
      <text:p text:style-name="Text_20_body"><text:span text:style-name="T1">R</text:span>ecorrer un directorio raíz, localizar archivos Markdown, leerlos, aplicar el chunker Markdown ya existente y devolver una lista acumulada de chunks.</text:p>
      <text:p text:style-name="Text_20_body">Flujo esperado:</text:p>
      <text:p text:style-name="Text_20_body">repository root<text:line-break/>→ recursive file discovery<text:line-break/>→ filter .md files<text:line-break/>→ read file content<text:line-break/>→ calculate relative file_path<text:line-break/>→ chunk_markdown_text()<text:line-break/>→ collect chunks<text:line-break/>→ return list[Chunk]</text:p>
      <text:p text:style-name="Text_20_body">Al terminar esta tarea, el programa debe ser capaz de recibir una carpeta como entrada y convertir todos sus archivos Markdown válidos en chunks con rutas relativas y offsets correctos dentro de cada archivo.</text:p>
      <text:p text:style-name="Text_20_body">============================================================</text:p>
      <text:p text:style-name="P7">Crear una función, por ejemplo:</text:p>
      <text:p text:style-name="Text_20_body">chunk_markdown_files(root_path, max_chunk_size, overlap) -&gt; list[Chunk]</text:p>
      <text:p text:style-name="Text_20_body">Responsabilidad:</text:p>
      <text:p text:style-name="Text_20_body">Recorrer recursivamente root_path, encontrar archivos Markdown y aplicar chunk_markdown_text() a cada archivo encontrado.</text:p>
      <text:p text:style-name="Text_20_body">Parámetros:</text:p>
      <text:p text:style-name="Text_20_body">root_path:<text:line-break/>Ruta raíz desde la que se buscarán archivos Markdown. Puede ser str o Path, pero internamente conviene trabajar con pathlib.Path.</text:p>
      <text:p text:style-name="Text_20_body">max_chunk_size:<text:line-break/>Tamaño máximo permitido para cada chunk.</text:p>
      <text:p text:style-name="Text_20_body">overlap:<text:line-break/>Número de caracteres de solape cuando un bloque necesite dividirse con fallback fijo.</text:p>
      <text:p text:style-name="Text_20_body">Salida:</text:p>
      <text:p text:style-name="Text_20_body">Una lista de objetos Chunk.</text:p>
      <text:p text:style-name="Text_20_body">Cada Chunk debe incluir:</text:p>
      <text:p text:style-name="Text_20_body">file_path:<text:line-break/>Ruta relativa del archivo Markdown respecto a root_path.</text:p>
      <text:p text:style-name="Text_20_body"><text:soft-page-break/>first_character_index:<text:line-break/>Índice inicial del chunk dentro del archivo original.</text:p>
      <text:p text:style-name="Text_20_body">last_character_index:<text:line-break/>Índice final excluido del chunk dentro del archivo original.</text:p>
      <text:p text:style-name="Text_20_body">content:<text:line-break/>Texto exacto del chunk.</text:p>
      <text:p text:style-name="P2">============================================================</text:p>
      <text:p text:style-name="P3">Regla sobre file_path</text:p>
      <text:p text:style-name="Text_20_body">El campo file_path de cada chunk debe ser relativo al directorio raíz recibido.</text:p>
      <text:p text:style-name="Text_20_body">No debe ser una ruta absoluta.</text:p>
      <text:p text:style-name="Text_20_body">Ejemplo incorrecto:</text:p>
      <text:p text:style-name="Text_20_body">/home/user/project/data/raw/vllm-0.10.1/docs/index.md</text:p>
      <text:p text:style-name="Text_20_body">Ejemplo correcto:</text:p>
      <text:p text:style-name="Text_20_body">docs/index.md</text:p>
      <text:p text:style-name="Text_20_body">Usar relative_to(root_path) para calcular la ruta relativa.</text:p>
      <text:p text:style-name="Text_20_body">Después convertirla a str.</text:p>
      <text:p text:style-name="Text_20_body">En sistemas Linux, pathlib normalmente usará / como separador. Si se quiere máxima portabilidad, se puede normalizar a formato POSIX usando as_posix().</text:p>
      <text:p text:style-name="Text_20_body">Ejemplo conceptual:</text:p>
      <text:p text:style-name="Text_20_body">absolute_file_path:<text:line-break/>data/raw/vllm-0.10.1/docs/index.md</text:p>
      <text:p text:style-name="Text_20_body">root_path:<text:line-break/>data/raw/vllm-0.10.1</text:p>
      <text:p text:style-name="Text_20_body">file_path resultante:<text:line-break/>docs/index.md</text:p>
      <text:p text:style-name="Text_20_body">La comparación de extensión debe hacerse de forma segura. Recomendación:</text:p>
      <text:p text:style-name="Text_20_body">file_path.suffix.lower() == ".md"</text:p>
      <text:p text:style-name="Text_20_body">Así se aceptan también archivos con extensión .MD si existieran.</text:p>
      <text:p text:style-name="P2"><text:span text:style-name="T1">Para encontrar ficheros podrías usar </text:span>root_path.rglob("*.md")</text:p>
      <text:p text:style-name="P2">============================================================</text:p>
      <text:p text:style-name="P3"><text:span text:style-name="T1">Opcional - </text:span>Directorios a ignorar</text:p>
      <text:p text:style-name="Text_20_body">La búsqueda debe evitar directorios claramente inútiles para el proyecto.</text:p>
      <text:p text:style-name="Text_20_body">Lista inicial de directorios a ignorar:</text:p>
      <text:p text:style-name="Text_20_body"><text:soft-page-break/>.git<text:line-break/><text:span text:style-name="Strong_20_Emphasis">pycache</text:span><text:line-break/>.venv<text:line-break/>venv<text:line-break/>node_modules<text:line-break/>dist<text:line-break/>build<text:line-break/>.mypy_cache<text:line-break/>.pytest_cache<text:line-break/>.ruff_cache</text:p>
      <text:p text:style-name="Text_20_body">Estos directorios pueden contener muchos archivos irrelevantes, cachés o dependencias externas.</text:p>
      <text:p text:style-name="Text_20_body">La función no debería recorrerlos.</text:p>
      <text:p text:style-name="Text_20_body">Recomendación de diseño:</text:p>
      <text:p text:style-name="Text_20_body">Tener una colección constante:</text:p>
      <text:p text:style-name="Text_20_body">IGNORED_DIR_NAMES = {<text:line-break/>".git",<text:line-break/>"<text:span text:style-name="Strong_20_Emphasis">pycache</text:span>",<text:line-break/>".venv",<text:line-break/>"venv",<text:line-break/>"node_modules",<text:line-break/>"dist",<text:line-break/>"build",<text:line-break/>".mypy_cache",<text:line-break/>".pytest_cache",<text:line-break/>".ruff_cache",<text:line-break/>}</text:p>
      <text:p text:style-name="Text_20_body">Durante el recorrido, si cualquier parte de la ruta pertenece a esa lista, el archivo debe ignorarse.</text:p>
      <text:p text:style-name="P8">============================================================</text:p>
      <text:p text:style-name="P4">Lectura de archivos</text:p>
      <text:p text:style-name="P8">Cada archivo Markdown debe leerse como texto "utf-8"</text:p>
      <text:p text:style-name="Text_20_body">text = file_path.read_text(encoding="utf-8")</text:p>
      <text:list xml:id="list3385816780" text:style-name="L1">
        <text:list-item>
          <text:p text:style-name="P10">si el archivo se puede leer, se procesa;</text:p>
        </text:list-item>
        <text:list-item>
          <text:p text:style-name="P10">si el archivo no se puede leer como UTF-8, se omite y se registra el problema;</text:p>
        </text:list-item>
        <text:list-item>
          <text:p text:style-name="P10">el resto de archivos continúa procesándose.</text:p>
        </text:list-item>
      </text:list>
      <text:p text:style-name="P8">============================================================</text:p>
      <text:p text:style-name="P4">Orden de procesamiento</text:p>
      <text:p text:style-name="P8"><text:span text:style-name="T2">Si se o</text:span>rdena<text:span text:style-name="T2">n</text:span> los archivos antes de procesarlos. La lista final de chunks quedará ordenada por:</text:p>
      <text:p text:style-name="Text_20_body"><text:soft-page-break/>file_path<text:line-break/>first_character_index</text:p>
      <text:p text:style-name="Text_20_body">Esto será útil más adelante para depuración, serialización e indexación reproducible.</text:p>
      <text:p text:style-name="P8">============================================================</text:p>
      <text:p text:style-name="P4">Gestión de errores recomendada</text:p>
      <text:p text:style-name="Text_20_body">Errores de parámetros:</text:p>
      <text:p text:style-name="Text_20_body">Si root_path no existe:<text:line-break/>debe tratarse como error.</text:p>
      <text:p text:style-name="Text_20_body">Si root_path no es un directorio:<text:line-break/>debe tratarse como error.</text:p>
      <text:p text:style-name="P9">No sé si merece la pena seguir comprobando ciertos valores que ya deberíamos saber <text:span text:style-name="T3">que están bien.</text:span> </text:p>
      <text:p text:style-name="Text_20_body">Si max_chunk_size &lt;= 0:<text:line-break/>debe tratarse como error.</text:p>
      <text:p text:style-name="Text_20_body">Si overlap &lt; 0:<text:line-break/>debe tratarse como error.</text:p>
      <text:p text:style-name="Text_20_body">Si overlap &gt;= max_chunk_size:<text:line-break/>debe tratarse como error.</text:p>
      <text:p text:style-name="Text_20_body">Estos errores indican mal uso de la función, por lo que es razonable lanzar ValueError o FileNotFoundError, según el caso.</text:p>
      <text:p text:style-name="Text_20_body">Errores de archivo individual:</text:p>
      <text:p text:style-name="Text_20_body">Si un archivo concreto no puede leerse:<text:line-break/>no debería <text:span text:style-name="T3">detener el proceso.</text:span></text:p>
      <text:p text:style-name="Text_20_body">Opciones válidas:</text:p>
      <text:list xml:id="list1957287448" text:style-name="L2">
        <text:list-item>
          <text:p text:style-name="P11">Omitir el archivo y mostrar un aviso.</text:p>
        </text:list-item>
        <text:list-item>
          <text:p text:style-name="P12">Omitir el archivo y acumular el error en una estructura auxiliar.</text:p>
        </text:list-item>
      </text:list>
      <text:p text:style-name="P5">Criterios de aceptación</text:p>
      <text:p text:style-name="Text_20_body">La tarea se considera completada cuando:</text:p>
      <text:list xml:id="list3658246995" text:style-name="L3">
        <text:list-item>
          <text:p text:style-name="P13">Existe una función chunk_markdown_files().</text:p>
        </text:list-item>
        <text:list-item>
          <text:p text:style-name="P13">La función recibe root_path, max_chunk_size y overlap.</text:p>
        </text:list-item>
        <text:list-item>
          <text:p text:style-name="P13">La función recorre root_path de forma recursiva.</text:p>
        </text:list-item>
        <text:list-item>
          <text:p text:style-name="P13">La función procesa sólo archivos .md.</text:p>
        </text:list-item>
        <text:list-item>
          <text:p text:style-name="P13">La función ignora directorios no relevantes como .git, <text:span text:style-name="Strong_20_Emphasis">pycache</text:span>, .venv, node_modules, dist y build.</text:p>
        </text:list-item>
        <text:list-item>
          <text:p text:style-name="P13">La función lee archivos Markdown como UTF-8.</text:p>
        </text:list-item>
        <text:list-item>
          <text:p text:style-name="P13"><text:soft-page-break/>La función calcula file_path relativo a root_path.</text:p>
        </text:list-item>
        <text:list-item>
          <text:p text:style-name="P13">La función aplica chunk_markdown_text() a cada archivo.</text:p>
        </text:list-item>
        <text:list-item>
          <text:p text:style-name="P13">La función acumula todos los chunks en una lista.</text:p>
        </text:list-item>
        <text:list-item>
          <text:p text:style-name="P13">La función devuelve list[Chunk].</text:p>
        </text:list-item>
        <text:list-item>
          <text:p text:style-name="P13">No se usan rutas absolutas en file_path.</text:p>
        </text:list-item>
      </text:list>
      <text:p text:style-name="P1">============================================================</text:p>
      <text:p text:style-name="P6">Resumen</text:p>
      <text:p text:style-name="Text_20_body">Implementa una función que convierta una carpeta con archivos Markdown en una lista de chunks.</text:p>
      <text:p text:style-name="Text_20_body">La tarea sólo consiste en:</text:p>
      <text:p text:style-name="Text_20_body">buscar .md<text:line-break/>ignorar directorios basura<text:line-break/>leer texto<text:line-break/>calcular ruta relativa<text:line-break/>llamar a chunk_markdown_text<text:line-break/>devolver chunks</text:p>
      <text:p text:style-name="Text_20_body">La prioridad técnica es que cada chunk conserve una ruta relativa correcta y que sus índices sigan refiriéndose al contenido original de su archiv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4T10:45:09.063745629</meta:creation-date>
    <dc:date>2026-05-14T20:44:20.385201035</dc:date>
    <meta:editing-duration>PT10M2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5" meta:paragraph-count="99" meta:word-count="764" meta:character-count="5718" meta:non-whitespace-character-count="5068"/>
  </office:meta>
</office:document-meta>
</file>