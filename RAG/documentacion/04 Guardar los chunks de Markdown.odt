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eff13" officeooo:paragraph-rsid="001eff13"/>
    </style:style>
    <style:style style:name="P2" style:family="paragraph" style:parent-style-name="Text_20_body">
      <style:text-properties officeooo:paragraph-rsid="001dc330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text-properties officeooo:paragraph-rsid="001dc330"/>
    </style:style>
    <style:style style:name="T1" style:family="text">
      <style:text-properties officeooo:rsid="001dc330"/>
    </style:style>
    <style:style style:name="T2" style:family="text">
      <style:text-properties officeooo:rsid="00236b1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uardar Markdown</text:h>
      <text:h text:style-name="Heading_20_2" text:outline-level="2">Objetivo de la tarea</text:h>
      <text:p text:style-name="Text_20_body">Implementar una fase básica de persistencia para los chunks generados a partir de archivos Markdown.</text:p>
      <text:p text:style-name="Text_20_body">Flujo esperado:</text:p>
      <text:p text:style-name="Text_20_body">root_path<text:line-break/>→ descubrir archivos Markdown<text:line-break/>→ generar chunks<text:line-break/>→ guardar chunks en JSON<text:line-break/>→ cargar chunks desde JSON<text:line-break/>→ reconstruir list[Chunk]</text:p>
      <text:h text:style-name="Heading_20_2" text:outline-level="2">Funciones principales esperadas</text:h>
      <text:p text:style-name="Text_20_body">Implementar dos funciones:</text:p>
      <text:p text:style-name="Text_20_body">save_chunks(chunks, output_path)</text:p>
      <text:p text:style-name="P2">load_chunks(input_path)</text:p>
      <text:h text:style-name="Heading_20_2" text:outline-level="2"><text:span text:style-name="T1">F</text:span>unción save_chunks</text:h>
      <text:p text:style-name="Text_20_body">Firma recomendada:</text:p>
      <text:p text:style-name="Text_20_body">save_chunks(chunks: list[Chunk], output_path: str) -&gt; None</text:p>
      <text:p text:style-name="Text_20_body">Comportamiento esperado:</text:p>
      <text:list text:style-name="L1">
        <text:list-item>
          <text:p text:style-name="P3">Recibe una lista de objetos <text:span text:style-name="Source_20_Text">Chunk</text:span>.</text:p>
        </text:list-item>
        <text:list-item>
          <text:p text:style-name="P3">Convierte cada <text:span text:style-name="Source_20_Text">Chunk</text:span> a una estructura serializable.</text:p>
        </text:list-item>
        <text:list-item>
          <text:p text:style-name="P3">Crea el directorio padre de <text:span text:style-name="Source_20_Text">output_path</text:span> si no existe.</text:p>
        </text:list-item>
        <text:list-item>
          <text:p text:style-name="P3">Guarda un archivo JSON en UTF-8.</text:p>
        </text:list-item>
        <text:list-item>
          <text:p text:style-name="P3">El JSON debe ser legible y estable.</text:p>
        </text:list-item>
      </text:list>
      <text:p text:style-name="Text_20_body">Formato recomendado:</text:p>
      <text:p text:style-name="Text_20_body">{<text:line-break/>"chunks": [<text:line-break/>{<text:line-break/>"file_path": "docs/index.md",<text:line-break/>"first_character_index": 0,<text:line-break/>"last_character_index": 1200,<text:line-break/><text:soft-page-break/>"content": "..."<text:line-break/>},<text:line-break/>{<text:line-break/>"file_path": "docs/usage.md",<text:line-break/>"first_character_index": 0,<text:line-break/>"last_character_index": 900,<text:line-break/>"content": "..."<text:line-break/>}<text:line-break/>]<text:line-break/>}</text:p>
      <text:p text:style-name="Text_20_body">porque el objeto raíz permite añadir más metadatos en el futuro sin romper el formato.</text:p>
      <text:p text:style-name="Text_20_body">Ejemplos de metadatos futuros:</text:p>
      <text:p text:style-name="Text_20_body">{<text:line-break/>"version": 1,<text:line-break/>"root_path": "data/raw/vllm-0.10.1",<text:line-break/>"max_chunk_size": 2000,<text:line-break/>"overlap": 200,<text:line-break/>"chunks": [...]<text:line-break/>}</text:p>
      <text:p text:style-name="Text_20_body"><text:span text:style-name="T1">Por ahora</text:span>, sólo <text:span text:style-name="T1">guardamos</text:span> <text:span text:style-name="Source_20_Text">"chunks"</text:span>.</text:p>
      <text:h text:style-name="Heading_20_2" text:outline-level="2">Función load_chunks</text:h>
      <text:p text:style-name="Text_20_body">Firma recomendada:</text:p>
      <text:p text:style-name="Text_20_body">load_chunks(input_path: str) -&gt; list[Chunk]</text:p>
      <text:p text:style-name="Text_20_body">Responsabilidad:</text:p>
      <text:p text:style-name="Text_20_body">Leer un archivo JSON generado por <text:span text:style-name="Source_20_Text">save_chunks()</text:span> y reconstruir una lista de objetos <text:span text:style-name="Source_20_Text">Chunk</text:span>.</text:p>
      <text:p text:style-name="Text_20_body">Parámetros:</text:p>
      <text:p text:style-name="Text_20_body">input_path:<text:line-break/>Ruta del archivo JSON a cargar.</text:p>
      <text:p text:style-name="Text_20_body">Comportamiento esperado:</text:p>
      <text:list text:style-name="L2">
        <text:list-item>
          <text:p text:style-name="P4">Abre el archivo JSON en UTF-8.</text:p>
        </text:list-item>
        <text:list-item>
          <text:p text:style-name="P4">Lee el objeto raíz.</text:p>
        </text:list-item>
        <text:list-item>
          <text:p text:style-name="P4">Extrae la lista <text:span text:style-name="Source_20_Text">"chunks"</text:span>.</text:p>
        </text:list-item>
        <text:list-item>
          <text:p text:style-name="P4">Convierte cada diccionario en un objeto <text:span text:style-name="Source_20_Text">Chunk</text:span>.</text:p>
        </text:list-item>
        <text:list-item>
          <text:p text:style-name="P4">Devuelve <text:span text:style-name="Source_20_Text">list[Chunk]</text:span>.</text:p>
        </text:list-item>
      </text:list>
      <text:p text:style-name="Text_20_body"><text:soft-page-break/>No debe devolver una lista de diccionarios.</text:p>
      <text:p text:style-name="Text_20_body">Debe devolver objetos reales del modelo <text:span text:style-name="Source_20_Text">Chunk</text:span>.</text:p>
      <text:h text:style-name="Heading_20_2" text:outline-level="2">Validaciones mínimas</text:h>
      <text:p text:style-name="Text_20_body">Para <text:span text:style-name="Source_20_Text">save_chunks</text:span>:</text:p>
      <text:list text:style-name="L3">
        <text:list-item>
          <text:p text:style-name="P5">Si <text:span text:style-name="Source_20_Text">output_path</text:span> apunta a un directorio en vez de a un archivo, debe tratarse como error.</text:p>
        </text:list-item>
        <text:list-item>
          <text:p text:style-name="P5">Si el directorio padre no existe, debe crearse. <text:span text:style-name="T2">Yo creo sólo el último, si no existe el directorio parent, doy un error.</text:span></text:p>
        </text:list-item>
        <text:list-item>
          <text:p text:style-name="P5">La función no debe modificar los chunks recibidos.</text:p>
        </text:list-item>
        <text:list-item>
          <text:p text:style-name="P5">La función debe guardar todos los campos necesarios del modelo <text:span text:style-name="Source_20_Text">Chunk</text:span>.</text:p>
        </text:list-item>
      </text:list>
      <text:p text:style-name="Text_20_body">Para <text:span text:style-name="Source_20_Text">load_chunks</text:span>:</text:p>
      <text:list text:style-name="L4">
        <text:list-item>
          <text:p text:style-name="P6">Si el archivo no existe, debe lanzarse un error claro.</text:p>
        </text:list-item>
        <text:list-item>
          <text:p text:style-name="P6">Si el JSON no tiene la clave <text:span text:style-name="Source_20_Text">"chunks"</text:span>, debe lanzarse un error claro.</text:p>
        </text:list-item>
        <text:list-item>
          <text:p text:style-name="P6">Si algún chunk no tiene los campos esperados, la validación del modelo <text:span text:style-name="Source_20_Text">Chunk</text:span> debe detectar el problema.</text:p>
        </text:list-item>
        <text:list-item>
          <text:p text:style-name="P6">Si el JSON está mal formado, debe fallar de forma explícita.</text:p>
        </text:list-item>
      </text:list>
      <text:p text:style-name="P2">No hace falta construir todavía un sistema sofisticado de errores. Se pueden usar las excepciones estándar de Python y Pydantic.</text:p>
      <text:h text:style-name="Heading_20_2" text:outline-level="2">Requisitos del formato JSON</text:h>
      <text:p text:style-name="Text_20_body">Recomendación:</text:p>
      <text:p text:style-name="Text_20_body">Usar indentación:</text:p>
      <text:p text:style-name="Text_20_body">indent=2</text:p>
      <text:p text:style-name="Text_20_body">Usar:</text:p>
      <text:p text:style-name="Text_20_body">ensure_ascii=False</text:p>
      <text:p text:style-name="Text_20_body">Esto evita convertir caracteres Unicode en secuencias escapadas innecesariamente.</text:p>
      <text:p text:style-name="Text_20_body">Ejemplo:</text:p>
      <text:p text:style-name="P2">json.dump(data, file, indent=2, ensure_ascii=False)</text:p>
      <text:h text:style-name="Heading_20_2" text:outline-level="2">Compatibilidad con Pydantic</text:h>
      <text:p text:style-name="Text_20_body">El modelo <text:span text:style-name="Source_20_Text">Chunk</text:span> es un modelo Pydantic.</text:p>
      <text:p text:style-name="Text_20_body">Para serializarlo, se puede usar:</text:p>
      <text:p text:style-name="Text_20_body"><text:soft-page-break/>chunk.model_dump()</text:p>
      <text:p text:style-name="Text_20_body">Para reconstruir el modelo:</text:p>
      <text:p text:style-name="Text_20_body">Chunk.model_validate(chunk_data)</text:p>
      <text:h text:style-name="Heading_20_2" text:outline-level="2">Ubicación recomendada de los archivos generados</text:h>
      <text:p text:style-name="Text_20_body">Guardar los chunks procesados bajo:</text:p>
      <text:p text:style-name="Text_20_body">data/processed/</text:p>
      <text:p text:style-name="P2">Nombre recomendado data/processed/chunks_markdown.json</text:p>
      <text:h text:style-name="Heading_20_2" text:outline-level="2">Criterios de aceptación</text:h>
      <text:p text:style-name="Text_20_body">La tarea se considera completada cuando:</text:p>
      <text:list text:style-name="L5">
        <text:list-item>
          <text:p text:style-name="P7">Existe una función <text:span text:style-name="Source_20_Text">save_chunks()</text:span>.</text:p>
        </text:list-item>
        <text:list-item>
          <text:p text:style-name="P7">Existe una función <text:span text:style-name="Source_20_Text">load_chunks()</text:span>.</text:p>
        </text:list-item>
        <text:list-item>
          <text:p text:style-name="P7"><text:span text:style-name="Source_20_Text">save_chunks()</text:span> guarda un JSON con objeto raíz y clave <text:span text:style-name="Source_20_Text">"chunks"</text:span>.</text:p>
        </text:list-item>
        <text:list-item>
          <text:p text:style-name="P7"><text:span text:style-name="Source_20_Text">load_chunks()</text:span> reconstruye una <text:span text:style-name="Source_20_Text">list[Chunk]</text:span>.</text:p>
        </text:list-item>
        <text:list-item>
          <text:p text:style-name="P7">El directorio de salida se crea automáticamente si no existe.</text:p>
        </text:list-item>
        <text:list-item>
          <text:p text:style-name="P7">El JSON se guarda en UTF-8.</text:p>
        </text:list-item>
        <text:list-item>
          <text:p text:style-name="P7">El JSON conserva caracteres Unicode.</text:p>
        </text:list-item>
        <text:list-item>
          <text:p text:style-name="P7">El JSON es legible para humanos.</text:p>
        </text:list-item>
        <text:list-item>
          <text:p text:style-name="P7">La carga valida los datos usando el modelo <text:span text:style-name="Source_20_Text">Chunk</text:span>.</text:p>
        </text:list-item>
        <text:list-item>
          <text:p text:style-name="P7">El flujo completo <text:span text:style-name="Source_20_Text">chunk_markdown_files → save_chunks → load_chunks</text:span> funciona.</text:p>
        </text:list-item>
        <text:list-item>
          <text:p text:style-name="P7">Las rutas relativas se mantienen.</text:p>
        </text:list-item>
        <text:list-item>
          <text:p text:style-name="P7">Los offsets se mantienen.</text:p>
        </text:list-item>
        <text:list-item>
          <text:p text:style-name="P8">El contenido de cada chunk se mantiene exactamente.</text:p>
        </text:list-item>
      </text:list>
      <text:h text:style-name="Heading_20_2" text:outline-level="2">Resumen</text:h>
      <text:p text:style-name="Text_20_body">Implementa una capa simple de almacenamiento para chunks.</text:p>
      <text:p text:style-name="Text_20_body">Entrada:</text:p>
      <text:p text:style-name="Text_20_body">list[Chunk]</text:p>
      <text:p text:style-name="Text_20_body">Salida:</text:p>
      <text:p text:style-name="Text_20_body"><text:soft-page-break/>archivo JSON</text:p>
      <text:p text:style-name="Text_20_body">Y después:</text:p>
      <text:p text:style-name="Text_20_body">archivo JSON</text:p>
      <text:p text:style-name="Text_20_body">Salida:</text:p>
      <text:p text:style-name="Text_20_body">list[Chunk]</text:p>
      <text:p text:style-name="Text_20_body">El formato recomendado es:</text:p>
      <text:p text:style-name="Text_20_body">{<text:line-break/>"chunks": [...]<text:line-break/>}</text:p>
      <text:p text:style-name="Text_20_body">La prioridad es que el guardado y la carga sean fiables, simples y compatibles con Pydantic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5T08:37:20.019367471</meta:creation-date>
    <dc:date>2026-05-15T09:41:55.125911331</dc:date>
    <meta:editing-duration>PT38M27S</meta:editing-duration>
    <meta:editing-cycles>4</meta:editing-cycles>
    <meta:generator>LibreOffice/25.2.3.2$Linux_X86_64 LibreOffice_project/520$Build-2</meta:generator>
    <meta:document-statistic meta:table-count="0" meta:image-count="0" meta:object-count="0" meta:page-count="5" meta:paragraph-count="98" meta:word-count="595" meta:character-count="4038" meta:non-whitespace-character-count="3572"/>
  </office:meta>
</office:document-meta>
</file>