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.0972in" style:contextual-spacing="false" fo:line-height="115%"/>
    </style:style>
    <style:style style:name="P2" style:family="paragraph" style:parent-style-name="Preformatted_20_Text">
      <style:paragraph-properties fo:margin-top="0in" fo:margin-bottom="0.0972in" style:contextual-spacing="false" fo:line-height="115%"/>
    </style:style>
    <style:style style:name="P3" style:family="paragraph" style:parent-style-name="Horizontal_20_Line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0.4925in" fo:text-indent="0in" style:auto-text-indent="false"/>
    </style:style>
    <style:style style:name="P11" style:family="paragraph" style:parent-style-name="Text_20_body">
      <style:paragraph-properties fo:margin-left="0.4925in" fo:text-indent="0in" style:auto-text-indent="false"/>
      <style:text-properties officeooo:paragraph-rsid="001e554f"/>
    </style:style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>
      <style:text-properties officeooo:paragraph-rsid="001e554f"/>
    </style:style>
    <style:style style:name="P15" style:family="paragraph" style:parent-style-name="Text_20_body">
      <style:text-properties officeooo:rsid="002790e1" officeooo:paragraph-rsid="002790e1"/>
    </style:style>
    <style:style style:name="P16" style:family="paragraph" style:parent-style-name="Text_20_body" style:list-style-name="L6">
      <style:text-properties officeooo:paragraph-rsid="001e554f"/>
    </style:style>
    <style:style style:name="P17" style:family="paragraph" style:parent-style-name="Text_20_body" style:list-style-name="L7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>
      <style:text-properties officeooo:paragraph-rsid="001ee127"/>
    </style:style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9"/>
    <style:style style:name="P24" style:family="paragraph" style:parent-style-name="Heading_20_2">
      <style:paragraph-properties fo:margin-top="0in" fo:margin-bottom="0in" style:contextual-spacing="false"/>
    </style:style>
    <style:style style:name="P25" style:family="paragraph" style:parent-style-name="Text_20_body" style:list-style-name="L10">
      <style:paragraph-properties fo:margin-top="0in" fo:margin-bottom="0in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1">
      <style:paragraph-properties fo:margin-top="0in" fo:margin-bottom="0in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2">
      <style:paragraph-properties fo:margin-top="0in" fo:margin-bottom="0in" style:contextual-spacing="false"/>
    </style:style>
    <style:style style:name="P30" style:family="paragraph" style:parent-style-name="Text_20_body" style:list-style-name="L12"/>
    <style:style style:name="P31" style:family="paragraph" style:parent-style-name="Text_20_body" style:list-style-name="L13">
      <style:paragraph-properties fo:margin-top="0in" fo:margin-bottom="0in" style:contextual-spacing="false"/>
    </style:style>
    <style:style style:name="P32" style:family="paragraph" style:parent-style-name="Text_20_body" style:list-style-name="L13"/>
    <style:style style:name="P33" style:family="paragraph" style:parent-style-name="Text_20_body" style:list-style-name="L14">
      <style:paragraph-properties fo:margin-top="0in" fo:margin-bottom="0in" style:contextual-spacing="false"/>
    </style:style>
    <style:style style:name="P34" style:family="paragraph" style:parent-style-name="Text_20_body" style:list-style-name="L14"/>
    <style:style style:name="P35" style:family="paragraph" style:parent-style-name="Text_20_body" style:list-style-name="L15"/>
    <style:style style:name="P36" style:family="paragraph" style:parent-style-name="Text_20_body" style:list-style-name="L16">
      <style:paragraph-properties fo:margin-top="0in" fo:margin-bottom="0in" style:contextual-spacing="false"/>
    </style:style>
    <style:style style:name="P37" style:family="paragraph" style:parent-style-name="Text_20_body" style:list-style-name="L16"/>
    <style:style style:name="T1" style:family="text">
      <style:text-properties officeooo:rsid="001aac41"/>
    </style:style>
    <style:style style:name="T2" style:family="text">
      <style:text-properties officeooo:rsid="00234f0c"/>
    </style:style>
    <style:style style:name="T3" style:family="text">
      <style:text-properties officeooo:rsid="0025a830"/>
    </style:style>
    <style:style style:name="fr1" style:family="graphic" style:parent-style-name="Inline_20_Heading">
      <style:graphic-properties style:vertical-pos="middle" style:vertical-rel="tex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1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05 </text:span>PRIMER ÍNDICE DE BÚSQUEDA CON TF-IDF</text:h>
      <text:h text:style-name="Heading_20_1" text:outline-level="1">Aclaraciones previas</text:h>
      <text:p text:style-name="Text_20_body">El orden más útil para aprenderlos en tu proyecto RAG sería este:</text:p>
      <text:h text:style-name="P1" text:outline-level="2">1. Vectorización</text:h>
      <text:p text:style-name="Text_20_body">Es el concepto más básico.</text:p>
      <text:p text:style-name="Text_20_body">Una IA o un algoritmo de búsqueda no compara textos directamente como lo hacemos nosotros. Primero convierte texto en números.</text:p>
      <text:p text:style-name="Text_20_body">Ejemplo conceptual:</text:p>
      <text:p text:style-name="P2"><text:span text:style-name="Source_20_Text">"installation server"</text:span></text:p>
      <text:p text:style-name="Text_20_body">se transforma en algo parecido a:</text:p>
      <text:p text:style-name="P2"><text:span text:style-name="Source_20_Text">[0.0, 0.7, 0.2, 0.0, 0.5]</text:span></text:p>
      <text:p text:style-name="Text_20_body">Ese vector representa el texto en un espacio numérico.</text:p>
      <text:p text:style-name="Text_20_body"><text:span text:style-name="Strong_20_Emphasis">Idea clave:</text:span> vectorizar es convertir texto en números para poder hacer cálculos.</text:p>
      <text:p text:style-name="P3"/>
      <text:h text:style-name="P1" text:outline-level="2">2. Similitud</text:h>
      <text:p text:style-name="Text_20_body">Una vez que tienes textos convertidos en vectores, puedes comparar si dos textos se parecen.</text:p>
      <text:p text:style-name="Text_20_body">En un buscador RAG, quieres comparar:</text:p>
      <text:p text:style-name="P2"><text:span text:style-name="Source_20_Text">query del usuario</text:span></text:p>
      <text:p text:style-name="Text_20_body">contra:</text:p>
      <text:p text:style-name="P2"><text:span text:style-name="Source_20_Text">chunks del documento</text:span></text:p>
      <text:p text:style-name="Text_20_body">La pregunta es:</text:p>
      <text:p text:style-name="P2"><text:span text:style-name="Source_20_Text">¿Qué chunk se parece más a la query?</text:span></text:p>
      <text:p text:style-name="Text_20_body"><text:span text:style-name="Strong_20_Emphasis">Idea clave:</text:span> similitud mide cuán cerca están dos vectores.</text:p>
      <text:p text:style-name="P3"/>
      <text:h text:style-name="P1" text:outline-level="2">3. <text:span text:style-name="Source_20_Text">top-k</text:span></text:h>
      <text:p text:style-name="Text_20_body"><text:span text:style-name="Source_20_Text">top-k</text:span> significa: devolver los <text:span text:style-name="Source_20_Text">k</text:span> mejores resultados.</text:p>
      <text:p text:style-name="Text_20_body">Si <text:span text:style-name="Source_20_Text">k = 3</text:span>, el buscador devuelve los 3 chunks más relevantes.</text:p>
      <text:p text:style-name="Text_20_body">Ejemplo:</text:p>
      <text:p text:style-name="P2"><text:span text:style-name="Source_20_Text">query = "installation"</text:span></text:p>
      <text:p text:style-name="P2"><text:soft-page-break/><text:span text:style-name="Source_20_Text">k = 3</text:span></text:p>
      <text:p text:style-name="Text_20_body">Resultado esperado:</text:p>
      <text:p text:style-name="P2"><text:span text:style-name="Source_20_Text">1. chunk más relacionado con installation</text:span></text:p>
      <text:p text:style-name="P2"><text:span text:style-name="Source_20_Text">2. segundo chunk más relacionado</text:span></text:p>
      <text:p text:style-name="P2"><text:span text:style-name="Source_20_Text">3. tercer chunk más relacionado</text:span></text:p>
      <text:p text:style-name="Text_20_body"><text:span text:style-name="Strong_20_Emphasis">Idea clave:</text:span> <text:span text:style-name="Source_20_Text">top-k</text:span> no busca “el resultado perfecto”, sino los mejores <text:span text:style-name="Source_20_Text">k</text:span> candidatos.</text:p>
      <text:p text:style-name="P3"/>
      <text:h text:style-name="P1" text:outline-level="2">4. TF-IDF</text:h>
      <text:p text:style-name="Text_20_body">TF-IDF es una técnica clásica para convertir textos en vectores.</text:p>
      <text:p text:style-name="Text_20_body">Significa:</text:p>
      <text:p text:style-name="P2"><text:span text:style-name="Source_20_Text">Term Frequency - Inverse Document Frequency</text:span></text:p>
      <text:p text:style-name="Text_20_body">La intuición es:</text:p>
      <text:p text:style-name="Text_20_body">Un término es importante si:</text:p>
      <text:list text:style-name="L1">
        <text:list-item>
          <text:p text:style-name="P4">aparece mucho en un documento o chunk;</text:p>
        </text:list-item>
        <text:list-item>
          <text:p text:style-name="P4">pero no aparece en todos los documentos.</text:p>
        </text:list-item>
      </text:list>
      <text:p text:style-name="Text_20_body">Por ejemplo, en documentación técnica:</text:p>
      <text:p text:style-name="P2"><text:span text:style-name="Source_20_Text">installation</text:span></text:p>
      <text:p text:style-name="P2"><text:span text:style-name="Source_20_Text">configuration</text:span></text:p>
      <text:p text:style-name="P2"><text:span text:style-name="Source_20_Text">server</text:span></text:p>
      <text:p text:style-name="Text_20_body">pueden ser palabras útiles.</text:p>
      <text:p text:style-name="Text_20_body">Pero palabras como:</text:p>
      <text:p text:style-name="P2"><text:span text:style-name="Source_20_Text">the</text:span></text:p>
      <text:p text:style-name="P2"><text:span text:style-name="Source_20_Text">and</text:span></text:p>
      <text:p text:style-name="P2"><text:span text:style-name="Source_20_Text">of</text:span></text:p>
      <text:p text:style-name="P2"><text:span text:style-name="Source_20_Text">is</text:span></text:p>
      <text:p text:style-name="Text_20_body">normalmente no ayudan mucho.</text:p>
      <text:p text:style-name="Text_20_body"><text:span text:style-name="Strong_20_Emphasis">Idea clave:</text:span> TF-IDF da más peso a las palabras que ayudan a distinguir un chunk de los demás.</text:p>
      <text:p text:style-name="P3"/>
      <text:h text:style-name="P1" text:outline-level="2">5. Matriz TF-IDF</text:h>
      <text:p text:style-name="Text_20_body">Cuando aplicas TF-IDF a todos los chunks, obtienes una matriz.</text:p>
      <text:p text:style-name="Text_20_body">Imagina que tienes 4 chunks y 6 palabras importantes:</text:p>
      <text:p text:style-name="P2"><text:soft-page-break/><text:span text:style-name="Source_20_Text"><text:s text:c="15"/>installation <text:s/>server <text:s/>config <text:s/>openai <text:s/>file <text:s/>error</text:span></text:p>
      <text:p text:style-name="P2"><text:span text:style-name="Source_20_Text">chunk 1 <text:s text:c="12"/>0.8 <text:s text:c="6"/>0.2 <text:s text:c="4"/>0.0 <text:s text:c="4"/>0.0 <text:s text:c="3"/>0.1 <text:s text:c="2"/>0.0</text:span></text:p>
      <text:p text:style-name="P2"><text:span text:style-name="Source_20_Text">chunk 2 <text:s text:c="12"/>0.0 <text:s text:c="6"/>0.1 <text:s text:c="4"/>0.9 <text:s text:c="4"/>0.0 <text:s text:c="3"/>0.0 <text:s text:c="2"/>0.2</text:span></text:p>
      <text:p text:style-name="P2"><text:span text:style-name="Source_20_Text">chunk 3 <text:s text:c="12"/>0.0 <text:s text:c="6"/>0.6 <text:s text:c="4"/>0.0 <text:s text:c="4"/>0.7 <text:s text:c="3"/>0.0 <text:s text:c="2"/>0.0</text:span></text:p>
      <text:p text:style-name="P2"><text:span text:style-name="Source_20_Text">chunk 4 <text:s text:c="12"/>0.1 <text:s text:c="6"/>0.0 <text:s text:c="4"/>0.0 <text:s text:c="4"/>0.0 <text:s text:c="3"/>0.8 <text:s text:c="2"/>0.3</text:span></text:p>
      <text:p text:style-name="Text_20_body">Cada fila representa un chunk.</text:p>
      <text:p text:style-name="Text_20_body">Cada columna representa una palabra o término del vocabulario.</text:p>
      <text:p text:style-name="Text_20_body"><text:span text:style-name="Strong_20_Emphasis">Idea clave:</text:span> la matriz TF-IDF es la representación numérica de todos tus chunks.</text:p>
      <text:p text:style-name="P3"/>
      <text:h text:style-name="P1" text:outline-level="2">6. <text:span text:style-name="Source_20_Text">cosine_similarity</text:span></text:h>
      <text:p text:style-name="Text_20_body"><text:span text:style-name="Source_20_Text">cosine_similarity</text:span> es una forma concreta de calcular similitud entre vectores.</text:p>
      <text:p text:style-name="Text_20_body">Compara la dirección de dos vectores, no tanto su tamaño.</text:p>
      <text:p text:style-name="Text_20_body">Esto viene muy bien para texto, porque dos textos pueden ser parecidos aunque uno sea más largo que otro.</text:p>
      <text:p text:style-name="Text_20_body">Ejemplo conceptual:</text:p>
      <text:p text:style-name="P2"><text:span text:style-name="Source_20_Text">query: "OpenAI server"</text:span></text:p>
      <text:p text:style-name="P2"><text:span text:style-name="Source_20_Text">chunk A: "How to configure the OpenAI server"</text:span></text:p>
      <text:p text:style-name="P2"><text:span text:style-name="Source_20_Text">chunk B: "How to install Python dependencies"</text:span></text:p>
      <text:p text:style-name="Text_20_body">El vector de la query debería parecerse más al chunk A.</text:p>
      <text:p text:style-name="Text_20_body"><text:span text:style-name="Strong_20_Emphasis">Idea clave:</text:span> <text:span text:style-name="Source_20_Text">cosine_similarity</text:span> sirve para comparar la query vectorizada contra los chunks vectorizados.</text:p>
      <text:p text:style-name="Text_20_body">Has puesto <text:span text:style-name="Source_20_Text">cosine_similarity</text:span> dos veces en la lista; conceptualmente sólo necesitas estudiarlo una vez.</text:p>
      <text:p text:style-name="P3"/>
      <text:h text:style-name="P1" text:outline-level="2">7. TF-IDF index</text:h>
      <text:p text:style-name="Text_20_body">El índice TF-IDF es el conjunto preparado para poder buscar.</text:p>
      <text:p text:style-name="Text_20_body">Normalmente contiene:</text:p>
      <text:p text:style-name="P2"><text:span text:style-name="Source_20_Text">vectorizer</text:span></text:p>
      <text:p text:style-name="P2"><text:span text:style-name="Source_20_Text">matrix</text:span></text:p>
      <text:p text:style-name="Text_20_body">Es decir:</text:p>
      <text:list text:style-name="L2">
        <text:list-item>
          <text:p text:style-name="P5">el objeto que sabe transformar texto en vectores;</text:p>
        </text:list-item>
        <text:list-item>
          <text:p text:style-name="P5">la matriz TF-IDF de todos los chunks.</text:p>
        </text:list-item>
      </text:list>
      <text:p text:style-name="Text_20_body"><text:soft-page-break/>En tu tarea, el flujo esperado es exactamente este: cargar chunks, construir índice TF-IDF, recibir una query, calcular similitud, ordenar resultados y devolver el <text:span text:style-name="Source_20_Text">top-k</text:span> de chunks relevantes.</text:p>
      <text:p text:style-name="Text_20_body"><text:span text:style-name="Strong_20_Emphasis">Idea clave:</text:span> el índice evita recalcular todo desde cero cada vez que haces una búsqueda.</text:p>
      <text:p text:style-name="P3"/>
      <text:h text:style-name="P1" text:outline-level="2">8. <text:span text:style-name="Source_20_Text">scikit-learn</text:span></text:h>
      <text:p text:style-name="Text_20_body"><text:span text:style-name="Source_20_Text">scikit-learn</text:span> es la librería de Python que vas a usar para no implementar TF-IDF desde cero.</text:p>
      <text:p text:style-name="Text_20_body">No es el concepto matemático. Es la herramienta práctica.</text:p>
      <text:p text:style-name="Text_20_body">Te da piezas ya hechas como:</text:p>
      <text:p text:style-name="P2"><text:span text:style-name="Source_20_Text">TfidfVectorizer</text:span></text:p>
      <text:p text:style-name="P2"><text:span text:style-name="Source_20_Text">cosine_similarity</text:span></text:p>
      <text:p text:style-name="Text_20_body"><text:span text:style-name="Strong_20_Emphasis">Idea clave:</text:span> <text:span text:style-name="Source_20_Text">scikit-learn</text:span> es la caja de herramientas; TF-IDF y similitud son las ideas que usas dentro de esa caja.</text:p>
      <text:p text:style-name="P3"/>
      <text:h text:style-name="P1" text:outline-level="2">9. <text:span text:style-name="Source_20_Text">TfidfVectorizer</text:span></text:h>
      <text:p text:style-name="Text_20_body"><text:span text:style-name="Source_20_Text">TfidfVectorizer</text:span> es una clase concreta de <text:span text:style-name="Source_20_Text">scikit-learn</text:span>.</text:p>
      <text:p text:style-name="Text_20_body">Hace varias cosas por ti:</text:p>
      <text:list text:style-name="L3">
        <text:list-item>
          <text:p text:style-name="P6">recibe una lista de textos;</text:p>
        </text:list-item>
        <text:list-item>
          <text:p text:style-name="P6">extrae vocabulario;</text:p>
        </text:list-item>
        <text:list-item>
          <text:p text:style-name="P6">calcula pesos TF-IDF;</text:p>
        </text:list-item>
        <text:list-item>
          <text:p text:style-name="P6">genera la matriz TF-IDF;</text:p>
        </text:list-item>
        <text:list-item>
          <text:p text:style-name="P6">luego puede transformar nuevas queries usando el mismo vocabulario.</text:p>
        </text:list-item>
      </text:list>
      <text:p text:style-name="Text_20_body">Conceptualmente:</text:p>
      <text:p text:style-name="P2"><text:span text:style-name="Source_20_Text">chunks de texto</text:span></text:p>
      <text:p text:style-name="P2"><text:span text:style-name="Source_20_Text">→ TfidfVectorizer</text:span></text:p>
      <text:p text:style-name="P2"><text:span text:style-name="Source_20_Text">→ matriz TF-IDF</text:span></text:p>
      <text:p text:style-name="Text_20_body">Y después:</text:p>
      <text:p text:style-name="P2"><text:span text:style-name="Source_20_Text">query</text:span></text:p>
      <text:p text:style-name="P2"><text:span text:style-name="Source_20_Text">→ mismo TfidfVectorizer</text:span></text:p>
      <text:p text:style-name="P2"><text:span text:style-name="Source_20_Text">→ vector de query</text:span></text:p>
      <text:p text:style-name="Text_20_body"><text:span text:style-name="Strong_20_Emphasis">Idea clave:</text:span> no debes crear un vectorizador nuevo para la query. La query debe transformarse usando el mismo vectorizador con el que construiste el índice.</text:p>
      <text:p text:style-name="P3"/>
      <text:h text:style-name="P1" text:outline-level="2"><text:soft-page-break/>10. BM25</text:h>
      <text:p text:style-name="Text_20_body">BM25 es otra técnica de búsqueda basada en palabras.</text:p>
      <text:p text:style-name="Text_20_body">Es parecida en espíritu a TF-IDF, pero suele funcionar mejor en motores de búsqueda clásicos.</text:p>
      <text:p text:style-name="Text_20_body">Diferencia simplificada:</text:p>
      <text:p text:style-name="P2"><text:span text:style-name="Source_20_Text">TF-IDF = baseline sencillo</text:span></text:p>
      <text:p text:style-name="P2"><text:span text:style-name="Source_20_Text">BM25 = ranking léxico más sofisticado</text:span></text:p>
      <text:p text:style-name="Text_20_body">Para tu proyecto, tiene sentido empezar con TF-IDF porque es más fácil de entender y validar. Más adelante podrías sustituirlo por BM25 si tu diseño separa bien la interfaz de búsqueda.</text:p>
      <text:p text:style-name="Text_20_body"><text:span text:style-name="Strong_20_Emphasis">Idea clave:</text:span> BM25 puede reemplazar a TF-IDF, pero no debería obligarte a cambiar todo el proyecto.</text:p>
      <text:h text:style-name="Heading_20_2" text:outline-level="2"><text:span text:style-name="T2">11. </text:span>Resumen</text:h>
      <text:p text:style-name="Text_20_body">La idea central de esta tarea es:</text:p>
      <text:p text:style-name="P2"><text:span text:style-name="Source_20_Text">chunks</text:span></text:p>
      <text:p text:style-name="P2"><text:span text:style-name="Source_20_Text">→ vectorización TF-IDF</text:span></text:p>
      <text:p text:style-name="P2"><text:span text:style-name="Source_20_Text">→ matriz TF-IDF</text:span></text:p>
      <text:p text:style-name="P2"><text:span text:style-name="Source_20_Text">→ query vectorizada</text:span></text:p>
      <text:p text:style-name="P2"><text:span text:style-name="Source_20_Text">→ similitud</text:span></text:p>
      <text:p text:style-name="P2"><text:span text:style-name="Source_20_Text">→ ranking</text:span></text:p>
      <text:p text:style-name="P2"><text:span text:style-name="Source_20_Text">→ top-k chunks</text:span></text:p>
      <text:p text:style-name="Text_20_body">Eso es tu primer motor de búsqueda para el RAG. No es todavía “la IA generando respuestas”; es la parte previa: encontrar qué fragmentos del documento parecen relevantes para una pregunta.</text:p>
      <text:h text:style-name="Heading_20_1" text:outline-level="1">Tarea</text:h>
      <text:p text:style-name="Text_20_body">Objetivo de la tarea</text:p>
      <text:p text:style-name="Text_20_body">Implementar el primer motor de búsqueda del proyecto RAG usando TF-IDF como baseline.</text:p>
      <text:p text:style-name="Text_20_body">El objetivo es demostrar que el sistema puede recibir una query y devolver los chunks más relevantes.</text:p>
      <text:p text:style-name="Text_20_body">Flujo esperado:</text:p>
      <text:p text:style-name="Text_20_body">chunks_markdown.json<text:line-break/>→ load_chunks()<text:line-break/>→ build TF-IDF index<text:line-break/>→ query<text:line-break/>→ similarity ranking<text:line-break/>→ top-k chunks</text:p>
      <text:p text:style-name="Text_20_body"><text:soft-page-break/>Para esta primera versión se usará TF-IDF <text:span text:style-name="T1">porque </text:span>es más sencillo de implementar como baseline inicial que BM25 y permite validar rápidamente el flujo de recuperación:</text:p>
      <text:list text:style-name="L4">
        <text:list-item>
          <text:p text:style-name="P7">lista de textos; </text:p>
        </text:list-item>
        <text:list-item>
          <text:p text:style-name="P7">vectorización; </text:p>
        </text:list-item>
        <text:list-item>
          <text:p text:style-name="P7">query; </text:p>
        </text:list-item>
        <text:list-item>
          <text:p text:style-name="P7">similitud; </text:p>
        </text:list-item>
        <text:list-item>
          <text:p text:style-name="P7">ranking; </text:p>
        </text:list-item>
        <text:list-item>
          <text:p text:style-name="P8">top-k. </text:p>
        </text:list-item>
      </text:list>
      <text:p text:style-name="Text_20_body">Aunque el proyecto pueda cambiar más adelante a BM25, la interfaz de búsqueda debe diseñarse de forma que el resto del programa no dependa de los detalles internos de TF-IDF.</text:p>
      <text:p text:style-name="P9">Crear un módulo nuevo:</text:p>
      <text:p text:style-name="Text_20_body">retrieval.py</text:p>
      <text:p text:style-name="Text_20_body">Este módulo debe contener la lógica del primer buscador.</text:p>
      <text:h text:style-name="Heading_20_1" text:outline-level="1">scikit-learn</text:h>
      <text:p text:style-name="Text_20_body">Para una primera versión, <text:span text:style-name="T1">usaremos</text:span> scikit-learn:</text:p>
      <text:p text:style-name="Text_20_body">TfidfVectorizer: cosine_similarity</text:p>
      <text:p text:style-name="P10">from sklearn.feature_extraction.text import TfidfVectorizer<text:line-break/>from sklearn.metrics.pairwise import cosine_similarity</text:p>
      <text:p text:style-name="Text_20_body">Si el proyecto todavía no tiene scikit-learn como dependencia, debe añadirse al pyproject.toml usando uv.</text:p>
      <text:p text:style-name="P11">uv add scikit-learn</text:p>
      <text:h text:style-name="Heading_20_2" text:outline-level="2">Diseño de la interfaz </text:h>
      <text:p text:style-name="Text_20_body">La interfaz debe permitir cambiar TF-IDF por BM25 más adelante sin afectar al resto del proyecto.</text:p>
      <text:p text:style-name="Text_20_body"><text:span text:style-name="T3">P</text:span>uede basarse en dos funciones:</text:p>
      <text:p text:style-name="P10">build_tfidf_index(chunks)</text:p>
      <text:p text:style-name="P10">search_tfidf(query, chunks, index, k)</text:p>
      <text:p text:style-name="Text_20_body">O, si se prefiere un diseño algo más limpio, una clase:</text:p>
      <text:p text:style-name="Text_20_body">TfidfRetriever</text:p>
      <text:p text:style-name="Text_20_body">Responsabilidades:</text:p>
      <text:list text:style-name="L5">
        <text:list-item>
          <text:p text:style-name="P12">recibir chunks; </text:p>
        </text:list-item>
        <text:list-item>
          <text:p text:style-name="P12">construir el índice; </text:p>
        </text:list-item>
        <text:list-item>
          <text:p text:style-name="P12">buscar una query; </text:p>
        </text:list-item>
        <text:list-item>
          <text:p text:style-name="P13"><text:soft-page-break/>devolver top-k chunks. </text:p>
        </text:list-item>
      </text:list>
      <text:p text:style-name="P14">Para esta tarea se puede usar cualquiera de los dos enfoques, pero el objetivo conceptual es el mismo.</text:p>
      <text:p text:style-name="P15">Yo opté por una clase.</text:p>
      <text:h text:style-name="Heading_20_2" text:outline-level="2">Función build_tfidf_index </text:h>
      <text:p text:style-name="Text_20_body">build_tfidf_index(chunks: list[Chunk]) -&gt; TfidfIndex</text:p>
      <text:p text:style-name="Text_20_body">Responsabilidad: Construir una representación TF-IDF de todos los chunks.</text:p>
      <text:p text:style-name="Text_20_body">Proceso:</text:p>
      <text:list text:style-name="L6">
        <text:list-item>
          <text:p text:style-name="P16">Extraer el contenido textual de cada chunk: <text:s/>chunk.content</text:p>
        </text:list-item>
        <text:list-item>
          <text:p text:style-name="P16">Crear un vectorizador TF-IDF. </text:p>
        </text:list-item>
      </text:list>
      <text:list text:style-name="L7">
        <text:list-item>
          <text:p text:style-name="P17">Ajustar el vectorizador sobre todos los contenidos. </text:p>
        </text:list-item>
        <text:list-item>
          <text:p text:style-name="P17">Crear la matriz TF-IDF. </text:p>
        </text:list-item>
        <text:list-item>
          <text:p text:style-name="P18">Devolver una estructura que contenga el vectorizador y la matriz. </text:p>
        </text:list-item>
      </text:list>
      <text:p text:style-name="Text_20_body">Ejemplo:</text:p>
      <text:p text:style-name="P10">texts = [chunk.content for chunk in chunks]</text:p>
      <text:p text:style-name="P10">vectorizer = TfidfVectorizer()<text:line-break/>matrix = vectorizer.fit_transform(texts)</text:p>
      <text:p text:style-name="P11">return index</text:p>
      <text:h text:style-name="Heading_20_2" text:outline-level="2">Estructura de índice</text:h>
      <text:p text:style-name="Text_20_body">Puede ser una dataclass o un modelo simple.</text:p>
      <text:p text:style-name="Text_20_body">TfidfIndex:</text:p>
      <text:list text:style-name="L8">
        <text:list-item>
          <text:p text:style-name="P19">vectorizer </text:p>
        </text:list-item>
        <text:list-item>
          <text:p text:style-name="P20">matrix </text:p>
        </text:list-item>
      </text:list>
      <text:p text:style-name="Text_20_body">No es necesario usar Pydantic para esto, porque los objetos de scikit-learn no son datos serializables simples.</text:p>
      <text:p text:style-name="Text_20_body">Una dataclass sería suficiente.</text:p>
      <text:p text:style-name="Text_20_body">Responsabilidad:</text:p>
      <text:p text:style-name="Text_20_body">Representar el índice TF-IDF en memoria.</text:p>
      <text:p text:style-name="P21">En esta tarea no es obligatorio persistir el índice en disco. Primero se puede construir en memoria desde los chunks cargados.</text:p>
      <text:h text:style-name="Heading_20_2" text:outline-level="2"><text:soft-page-break/>Función search_tfidf </text:h>
      <text:p text:style-name="Text_20_body">Firma conceptual:</text:p>
      <text:p text:style-name="Text_20_body">search_tfidf(query: str, chunks: list[Chunk], index: TfidfIndex, k: int) -&gt; list[Chunk]</text:p>
      <text:p text:style-name="Text_20_body">Responsabilidad:</text:p>
      <text:p text:style-name="Text_20_body">Buscar los chunks más relevantes para una query.</text:p>
      <text:p text:style-name="Text_20_body">Entrada:</text:p>
      <text:p text:style-name="Text_20_body">query:<text:line-break/>Texto de búsqueda introducido por el usuario.</text:p>
      <text:p text:style-name="Text_20_body">chunks:<text:line-break/>Lista original de chunks en el mismo orden usado para construir el índice.</text:p>
      <text:p text:style-name="Text_20_body">index:<text:line-break/>Índice TF-IDF construido previamente.</text:p>
      <text:p text:style-name="Text_20_body">k:<text:line-break/>Número máximo de resultados a devolver.</text:p>
      <text:p text:style-name="Text_20_body">Proceso:</text:p>
      <text:list text:style-name="L9">
        <text:list-item>
          <text:p text:style-name="P22">Validar que k &gt; 0. </text:p>
        </text:list-item>
        <text:list-item>
          <text:p text:style-name="P22">Transformar la query usando el mismo vectorizador del índice. </text:p>
        </text:list-item>
        <text:list-item>
          <text:p text:style-name="P22">Calcular similitud entre la query y todos los chunks. </text:p>
        </text:list-item>
        <text:list-item>
          <text:p text:style-name="P22">Ordenar los chunks por score descendente. </text:p>
        </text:list-item>
        <text:list-item>
          <text:p text:style-name="P22">Devolver los k chunks más relevantes. </text:p>
        </text:list-item>
        <text:list-item>
          <text:p text:style-name="P23">Si k es mayor que el número total de chunks, devolver como máximo todos los chunks disponibles. </text:p>
        </text:list-item>
      </text:list>
      <text:p text:style-name="Text_20_body">Ejemplo conceptual:</text:p>
      <text:p text:style-name="Text_20_body">query_vector = index.vectorizer.transform([query])</text:p>
      <text:p text:style-name="Text_20_body">scores = cosine_similarity(query_vector, index.matrix)[0]</text:p>
      <text:p text:style-name="Text_20_body">ranking = ordenar índices por score descendente</text:p>
      <text:p text:style-name="Text_20_body">results = [chunks[i] for i in ranking[:k]]</text:p>
      <text:p text:style-name="P21">return results</text:p>
      <text:p text:style-name="P21"><draw:frame draw:style-name="fr1" draw:name="Frame1" text:anchor-type="as-char" draw:z-index="0"><draw:text-box fo:min-height="0in" fo:min-width="0in"><text:h text:style-name="P24" text:outline-level="2">Resultados de búsqueda</text:h></draw:text-box></draw:frame><text:s/></text:p>
      <text:p text:style-name="Text_20_body">En esta tarea, search_tfidf puede devolver directamente:</text:p>
      <text:p text:style-name="Text_20_body">list[Chunk]</text:p>
      <text:p text:style-name="Text_20_body">Esto es suficiente para validar que el motor de búsqueda funciona.</text:p>
      <text:p text:style-name="Text_20_body"><text:soft-page-break/>Más adelante, probablemente será mejor devolver una estructura más rica:</text:p>
      <text:p text:style-name="Text_20_body">SearchResult:</text:p>
      <text:list text:style-name="L10">
        <text:list-item>
          <text:p text:style-name="P25">chunk </text:p>
        </text:list-item>
        <text:list-item>
          <text:p text:style-name="P25">score </text:p>
        </text:list-item>
        <text:list-item>
          <text:p text:style-name="P26">rank </text:p>
        </text:list-item>
      </text:list>
      <text:p text:style-name="Text_20_body">Pero no es necesario para la primera versión.</text:p>
      <text:p text:style-name="Text_20_body">Si se quiere ya preparar el diseño futuro, se puede crear una dataclass:</text:p>
      <text:p text:style-name="Text_20_body">SearchResult:</text:p>
      <text:list text:style-name="L11">
        <text:list-item>
          <text:p text:style-name="P27">chunk: Chunk </text:p>
        </text:list-item>
        <text:list-item>
          <text:p text:style-name="P28">score: float </text:p>
        </text:list-item>
      </text:list>
      <text:p text:style-name="Text_20_body">Entonces search_tfidf devolvería:</text:p>
      <text:p text:style-name="Text_20_body">list[SearchResult]</text:p>
      <text:p text:style-name="Text_20_body">Ventaja:</text:p>
      <text:p text:style-name="Text_20_body">Permite ver por qué un resultado está antes que otro.</text:p>
      <text:p text:style-name="Text_20_body">Recomendación:</text:p>
      <text:p text:style-name="Text_20_body">Para aprendizaje y depuración, devolver SearchResult con score es más útil que devolver sólo Chunk.</text:p>
      <text:p text:style-name="Text_20_body">Pero para mantenerlo simple, se acepta devolver list[Chunk] en esta tarea.</text:p>
      <text:h text:style-name="Heading_20_2" text:outline-level="2">Validaciones mínimas </text:h>
      <text:p text:style-name="Text_20_body">build_tfidf_index debe validar:</text:p>
      <text:list text:style-name="L12">
        <text:list-item>
          <text:p text:style-name="P29">la lista de chunks no debe estar vacía; </text:p>
        </text:list-item>
        <text:list-item>
          <text:p text:style-name="P30">cada chunk debe tener content no vacío, o al menos debe gestionarse si está vacío. </text:p>
        </text:list-item>
      </text:list>
      <text:p text:style-name="Text_20_body">search_tfidf debe validar:</text:p>
      <text:list text:style-name="L13">
        <text:list-item>
          <text:p text:style-name="P31">query no debe estar vacía o sólo espacios; </text:p>
        </text:list-item>
        <text:list-item>
          <text:p text:style-name="P31">k debe ser mayor que 0; </text:p>
        </text:list-item>
        <text:list-item>
          <text:p text:style-name="P31">chunks e índice deben corresponderse; </text:p>
        </text:list-item>
        <text:list-item>
          <text:p text:style-name="P32">si k &gt; len(chunks), devolver sólo len(chunks) resultados. </text:p>
        </text:list-item>
      </text:list>
      <text:p text:style-name="Text_20_body">Comportamiento recomendado ante errores de uso:</text:p>
      <text:list text:style-name="L14">
        <text:list-item>
          <text:p text:style-name="P33">si chunks está vacío: ValueError; </text:p>
        </text:list-item>
        <text:list-item>
          <text:p text:style-name="P33">si query está vacía: ValueError; </text:p>
        </text:list-item>
        <text:list-item>
          <text:p text:style-name="P34">si k &lt;= 0: ValueError.</text:p>
        </text:list-item>
      </text:list>
      <text:list text:style-name="L15">
        <text:list-item>
          <text:p text:style-name="P35">Criterios de aceptación </text:p>
        </text:list-item>
      </text:list>
      <text:h text:style-name="Heading_20_2" text:outline-level="2" text:is-list-header="true"><text:soft-page-break/>La tarea se considera completada cuando:</text:h>
      <text:list text:style-name="L16">
        <text:list-item>
          <text:p text:style-name="P36">Existe un módulo retrieval.py. </text:p>
        </text:list-item>
        <text:list-item>
          <text:p text:style-name="P36">Existe una forma de construir un índice TF-IDF desde list[Chunk]. </text:p>
        </text:list-item>
        <text:list-item>
          <text:p text:style-name="P36">Existe una función o clase para buscar una query. </text:p>
        </text:list-item>
        <text:list-item>
          <text:p text:style-name="P36">La búsqueda devuelve top-k resultados ordenados por relevancia descendente. </text:p>
        </text:list-item>
        <text:list-item>
          <text:p text:style-name="P36">El resultado conserva el Chunk original con file_path y offsets. </text:p>
        </text:list-item>
        <text:list-item>
          <text:p text:style-name="P36">Una query “installation” devuelve primero el chunk relacionado con installation en la prueba manual. </text:p>
        </text:list-item>
        <text:list-item>
          <text:p text:style-name="P36">Una query “configuration” devuelve primero el chunk relacionado con configuration en la prueba manual. </text:p>
        </text:list-item>
        <text:list-item>
          <text:p text:style-name="P36">Una query “OpenAI server” devuelve primero el chunk relacionado con OpenAI/server en la prueba manual. </text:p>
        </text:list-item>
        <text:list-item>
          <text:p text:style-name="P36">El código valida entradas básicas: chunks vacíos, query vacía, k inválido. </text:p>
        </text:list-item>
        <text:list-item>
          <text:p text:style-name="P36">El resto del proyecto no depende directamente de TfidfVectorizer ni cosine_similarity. </text:p>
        </text:list-item>
        <text:list-item>
          <text:p text:style-name="P36">No se implementa todavía generación con LLM. </text:p>
        </text:list-item>
        <text:list-item>
          <text:p text:style-name="P37">No se implementa todavía evaluación del subject.</text:p>
        </text:list-item>
      </text:list>
      <text:h text:style-name="Heading_20_2" text:outline-level="2">Resumen</text:h>
      <text:p text:style-name="Text_20_body">Implementa el primer buscador del proyecto.</text:p>
      <text:p text:style-name="Text_20_body">Entrada:</text:p>
      <text:p text:style-name="Text_20_body"><text:tab/>list[Chunk]</text:p>
      <text:p text:style-name="Text_20_body">Proceso:</text:p>
      <text:p text:style-name="Text_20_body"><text:tab/>TF-IDF</text:p>
      <text:p text:style-name="Text_20_body">Salida:</text:p>
      <text:p text:style-name="Text_20_body"><text:tab/>top-k chunks relevantes para una query</text:p>
      <text:p text:style-name="Text_20_body">La prioridad no es tener el mejor retrieval posible. La prioridad es construir un baseline simple, medible y sustituible.</text:p>
      <text:p text:style-name="Text_20_body">El diseño debe permitir que más adelante TF-IDF pueda cambiarse por BM25 sin romper el resto del proyec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6T10:14:14.227500558</meta:creation-date>
    <meta:editing-duration>PT2H25M36S</meta:editing-duration>
    <meta:editing-cycles>10</meta:editing-cycles>
    <meta:generator>LibreOffice/25.2.3.2$Linux_X86_64 LibreOffice_project/520$Build-2</meta:generator>
    <dc:date>2026-05-16T13:24:27.864200296</dc:date>
    <meta:document-statistic meta:table-count="0" meta:image-count="0" meta:object-count="0" meta:page-count="10" meta:paragraph-count="268" meta:word-count="1749" meta:character-count="11270" meta:non-whitespace-character-count="9647"/>
  </office:meta>
</office:document-meta>
</file>