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Implementar la lectura y validación del JSON de preguntas del dataset</text:h>
      <text:h text:style-name="Heading_20_4" text:outline-level="4">Objetivo</text:h>
      <text:p text:style-name="Text_20_body">Implementar la capa de entrada del dataset RAG: leer un fichero JSON con preguntas, validarlo con modelos Pydantic y obtener de cada pregunta los campos necesarios para ejecutar la búsqueda posteriormente.</text:p>
      <text:p text:style-name="Text_20_body">Esta tarea debe preparar el sistema para pasar de:</text:p>
      <text:p text:style-name="P1"><text:span text:style-name="Source_20_Text">buscar una pregunta manual</text:span></text:p>
      <text:p text:style-name="Text_20_body">a:</text:p>
      <text:p text:style-name="Preformatted_20_Text"><text:span text:style-name="Source_20_Text">leer muchas preguntas del dataset</text:span></text:p>
      <text:p text:style-name="Preformatted_20_Text"><text:span text:style-name="Source_20_Text">buscar cada una</text:span></text:p>
      <text:p text:style-name="P1"><text:span text:style-name="Source_20_Text">conservar question_id y question originales</text:span></text:p>
      <text:h text:style-name="Heading_20_4" text:outline-level="4">Alcance de la tarea</text:h>
      <text:p text:style-name="Text_20_body">Crear los modelos Pydantic necesarios para representar el JSON de entrada del subject.</text:p>
      <text:p text:style-name="Text_20_body">Como mínimo, el sistema debe poder representar una pregunta sin responder con estos campos:</text:p>
      <text:p text:style-name="Preformatted_20_Text"><text:span text:style-name="Source_20_Text">question_id</text:span></text:p>
      <text:p text:style-name="P1"><text:span text:style-name="Source_20_Text">question</text:span></text:p>
      <text:p text:style-name="Text_20_body">Y un contenedor general del dataset con una lista de preguntas.</text:p>
      <text:p text:style-name="Text_20_body">Después, implementar una función de carga que:</text:p>
      <text:p text:style-name="Preformatted_20_Text"><text:span text:style-name="Source_20_Text">reciba la ruta del JSON de preguntas</text:span></text:p>
      <text:p text:style-name="Preformatted_20_Text"><text:span text:style-name="Source_20_Text">lea el fichero</text:span></text:p>
      <text:p text:style-name="Preformatted_20_Text"><text:span text:style-name="Source_20_Text">valide su estructura</text:span></text:p>
      <text:p text:style-name="P1"><text:span text:style-name="Source_20_Text">devuelva un objeto Pydantic del dataset</text:span></text:p>
      <text:p text:style-name="Text_20_body">La función debe fallar de forma controlada si:</text:p>
      <text:p text:style-name="Preformatted_20_Text"><text:span text:style-name="Source_20_Text">el fichero no existe</text:span></text:p>
      <text:p text:style-name="Preformatted_20_Text"><text:span text:style-name="Source_20_Text">el JSON no es válido</text:span></text:p>
      <text:p text:style-name="Preformatted_20_Text"><text:span text:style-name="Source_20_Text">falta rag_questions</text:span></text:p>
      <text:p text:style-name="Preformatted_20_Text"><text:span text:style-name="Source_20_Text">alguna pregunta no tiene question_id</text:span></text:p>
      <text:p text:style-name="Preformatted_20_Text"><text:span text:style-name="Source_20_Text">alguna pregunta no tiene question</text:span></text:p>
      <text:p text:style-name="P1"><text:span text:style-name="Source_20_Text">algún campo tiene un tipo incorrecto</text:span></text:p>
      <text:h text:style-name="Heading_20_4" text:outline-level="4">Resultado esperado</text:h>
      <text:p text:style-name="Text_20_body">Al terminar esta tarea, el proyecto debe poder hacer esto conceptualmente:</text:p>
      <text:p text:style-name="P1"><text:span text:style-name="Source_20_Text">dataset = cargar_json_de_preguntas(...)</text:span></text:p>
      <text:p text:style-name="Text_20_body">Y luego poder recorrer:</text:p>
      <text:p text:style-name="P1"><text:span text:style-name="Source_20_Text">dataset.rag_questions</text:span></text:p>
      <text:p text:style-name="Text_20_body">obteniendo para cada pregunta:</text:p>
      <text:p text:style-name="Preformatted_20_Text"><text:span text:style-name="Source_20_Text">question_id</text:span></text:p>
      <text:p text:style-name="P1"><text:span text:style-name="Source_20_Text">question</text:span></text:p>
      <text:p text:style-name="Text_20_body"><text:soft-page-break/>Todavía no es necesario generar el JSON final de resultados de búsqueda. Esta tarea sólo debe garantizar que ya tienes los datos de entrada correctos para poder hacerlo en la siguiente iteración.</text:p>
      <text:h text:style-name="Heading_20_4" text:outline-level="4">Criterios de aceptación</text:h>
      <text:p text:style-name="Text_20_body">La tarea estará terminada cuando:</text:p>
      <text:list xml:id="list1408407223" text:style-name="L1">
        <text:list-item>
          <text:p text:style-name="P2">Exista un modelo Pydantic para una pregunta de entrada.</text:p>
        </text:list-item>
        <text:list-item>
          <text:p text:style-name="P2">Exista un modelo Pydantic para el dataset de entrada.</text:p>
        </text:list-item>
        <text:list-item>
          <text:p text:style-name="P2">Se pueda cargar un JSON de preguntas desde disco.</text:p>
        </text:list-item>
        <text:list-item>
          <text:p text:style-name="P2">El JSON se valide antes de usarse.</text:p>
        </text:list-item>
        <text:list-item>
          <text:p text:style-name="P2">El programa pueda imprimir o inspeccionar <text:span text:style-name="Source_20_Text">question_id</text:span> y <text:span text:style-name="Source_20_Text">question</text:span> de cada pregunta cargada.</text:p>
        </text:list-item>
        <text:list-item>
          <text:p text:style-name="P2">No se invente ningún <text:span text:style-name="Source_20_Text">question_id</text:span>.</text:p>
        </text:list-item>
        <text:list-item>
          <text:p text:style-name="P2">No se modifique todavía <text:span text:style-name="Source_20_Text">TfidfRetriever.search()</text:span>.</text:p>
        </text:list-item>
        <text:list-item>
          <text:p text:style-name="P2">No se modifique todavía la generación con <text:span text:style-name="Source_20_Text">Small_LLM_Model</text:span>.</text:p>
        </text:list-item>
        <text:list-item>
          <text:p text:style-name="P2">No se mezcle esta tarea con la generación de respuestas finales.</text:p>
        </text:list-item>
      </text:list>
      <text:h text:style-name="Heading_20_4" text:outline-level="4">Fuera de alcance por ahora</text:h>
      <text:p text:style-name="Text_20_body">No hacer todavía:</text:p>
      <text:p text:style-name="Preformatted_20_Text"><text:span text:style-name="Source_20_Text">StudentSearchResults completo</text:span></text:p>
      <text:p text:style-name="Preformatted_20_Text"><text:span text:style-name="Source_20_Text">JSON final de retrieved_sources</text:span></text:p>
      <text:p text:style-name="Preformatted_20_Text"><text:span text:style-name="Source_20_Text">generación de answers para todo el dataset</text:span></text:p>
      <text:p text:style-name="Preformatted_20_Text"><text:span text:style-name="Source_20_Text">soporte para ficheros .py</text:span></text:p>
      <text:p text:style-name="Preformatted_20_Text"><text:span text:style-name="Source_20_Text">mejoras del ranking TF-IDF</text:span></text:p>
      <text:p text:style-name="P1"><text:span text:style-name="Source_20_Text">reconstrucción de contexto desde retrieved_sources</text:span></text:p>
      <text:h text:style-name="Heading_20_4" text:outline-level="4">Nota técnica importante</text:h>
      <text:p text:style-name="Text_20_body">En el código adjunto aparece un intento experimental dentro de <text:span text:style-name="Source_20_Text">__main__</text:span> para construir <text:span text:style-name="Source_20_Text">StudentSearchResults</text:span>, pero todavía no es el camino correcto: falta <text:span text:style-name="Source_20_Text">question_id</text:span>, no se crea un <text:span text:style-name="Source_20_Text">MinimalSearchResults</text:span>, no se añaden los <text:span text:style-name="Source_20_Text">MinimalSource</text:span> a una lista de fuentes, y además <text:span text:style-name="Source_20_Text">StudentSearchResults(k=0)</text:span> contradice tu propio modelo, porque <text:span text:style-name="Source_20_Text">k</text:span> está definido con <text:span text:style-name="Source_20_Text">gt=0</text:span>.</text:p>
      <text:p text:style-name="Text_20_body">Por tanto, la siguiente tarea no debería ser continuar ese <text:span text:style-name="Source_20_Text">__main__</text:span>, sino <text:span text:style-name="Strong_20_Emphasis">retroceder medio paso y crear primero la lectura validada del dataset de preguntas</text:spa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8T13:50:42.984032020</meta:creation-date>
    <dc:date>2026-05-18T13:52:48.194056613</dc:date>
    <meta:editing-duration>PT2M12S</meta:editing-duration>
    <meta:editing-cycles>1</meta:editing-cycles>
    <meta:document-statistic meta:table-count="0" meta:image-count="0" meta:object-count="0" meta:page-count="2" meta:paragraph-count="58" meta:word-count="440" meta:character-count="2842" meta:non-whitespace-character-count="2469"/>
    <meta:generator>LibreOffice/7.3.7.2$Linux_X86_64 LibreOffice_project/30$Build-2</meta:generator>
  </office:meta>
</office:document-meta>
</file>