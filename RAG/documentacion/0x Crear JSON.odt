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1d95d2"/>
    </style:style>
    <style:style style:name="P3" style:family="paragraph" style:parent-style-name="Text_20_body">
      <style:text-properties officeooo:paragraph-rsid="001d95d2"/>
    </style:style>
    <style:style style:name="P4" style:family="paragraph" style:parent-style-name="Text_20_body">
      <style:text-properties officeooo:rsid="001d95d2" officeooo:paragraph-rsid="001d95d2"/>
    </style:style>
    <style:style style:name="P5" style:family="paragraph" style:parent-style-name="Text_20_body">
      <style:paragraph-properties fo:margin-left="0.4925in" fo:text-indent="0in" style:auto-text-indent="false"/>
      <style:text-properties officeooo:rsid="001d95d2" officeooo:paragraph-rsid="001d95d2"/>
    </style:style>
    <style:style style:name="P6" style:family="paragraph" style:parent-style-name="Heading_20_4">
      <style:paragraph-properties fo:margin-left="0in" fo:text-indent="0in" style:auto-text-indent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T1" style:family="text">
      <style:text-properties officeooo:rsid="001d95d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Tarea: Generar el JSON de resultados de búsqueda exigido por el subject</text:h>
      <text:p text:style-name="Text_20_body">El objetivo de esta tarea es añadir una capa de adaptación entre el sistema interno de recuperación de chunks y el formato de salida exigido por el proyecto RAG.</text:p>
      <text:p text:style-name="Text_20_body">Actualmente, el sistema de búsqueda devuelve una lista interna de resultados (<text:span text:style-name="Source_20_Text">SearchResult</text:span>) que contiene el <text:span text:style-name="Source_20_Text">Chunk</text:span> recuperado y su <text:span text:style-name="Source_20_Text">score</text:span>. Este formato es útil para depuración, ranking y construcción del contexto para el LLM, pero <text:span text:style-name="Strong_20_Emphasis">no debe ser el formato final entregable</text:span>.</text:p>
      <text:p text:style-name="Text_20_body">Se debe implementar una función o conjunto pequeño de funciones que conviertan los resultados internos de búsqueda en el modelo mínimo exigido por el subject:</text:p>
      <text:p text:style-name="Preformatted_20_Text"><text:span text:style-name="Source_20_Text">StudentSearchResults</text:span></text:p>
      <text:p text:style-name="Preformatted_20_Text"><text:span text:style-name="Source_20_Text">└── search_results</text:span></text:p>
      <text:p text:style-name="Preformatted_20_Text"><text:span text:style-name="Source_20_Text"><text:s text:c="4"/>└── MinimalSearchResults</text:span></text:p>
      <text:p text:style-name="Preformatted_20_Text"><text:span text:style-name="Source_20_Text"><text:s text:c="8"/>└── retrieved_sources</text:span></text:p>
      <text:p text:style-name="P1"><text:span text:style-name="Source_20_Text"><text:s text:c="12"/>└── MinimalSource</text:span></text:p>
      <text:p text:style-name="Text_20_body">Cada fuente recuperada debe incluir únicamente:</text:p>
      <text:p text:style-name="Preformatted_20_Text"><text:span text:style-name="Source_20_Text">file_path</text:span></text:p>
      <text:p text:style-name="Preformatted_20_Text"><text:span text:style-name="Source_20_Text">first_character_index</text:span></text:p>
      <text:p text:style-name="P1"><text:span text:style-name="Source_20_Text">last_character_index</text:span></text:p>
      <text:p text:style-name="Text_20_body">No deben incluirse en el JSON final:</text:p>
      <text:p text:style-name="Preformatted_20_Text"><text:span text:style-name="Source_20_Text">score</text:span></text:p>
      <text:p text:style-name="Preformatted_20_Text"><text:span text:style-name="Source_20_Text">content</text:span></text:p>
      <text:p text:style-name="Preformatted_20_Text"><text:span text:style-name="Source_20_Text">rank</text:span></text:p>
      <text:p text:style-name="P1"><text:span text:style-name="Source_20_Text">metadata interna adicional</text:span></text:p>
      <text:p text:style-name="Text_20_body">El campo <text:span text:style-name="Source_20_Text">file_path</text:span> debe conservarse como ruta relativa al root del repositorio indexado, normalizada con <text:span text:style-name="Source_20_Text">/</text:span>, por ejemplo:</text:p>
      <text:p text:style-name="P2"><text:span text:style-name="Source_20_Text">docs/serving/openai_compatible_server.md</text:span></text:p>
      <text:p text:style-name="P3"><text:span text:style-name="T1">¡Ojo aquí! El subject dice “full path”, pero sus ejemplos son de path relativo.</text:span></text:p>
      <text:p text:style-name="P3"><text:span text:style-name="T1">Por eso, creo que n</text:span>o debe guardarse como path absoluto del sistema, ya que eso haría que la salida dependiera de la máquina local y probablemente no coincidiera con el formato esperado por el evaluador. <text:span text:style-name="T1">Esto lo veré más adelante, cuando pruebe el programa con moulinette.</text:span></text:p>
      <text:p text:style-name="P4">Hay que crear los modelos Pydantic</text:p>
      <text:p text:style-name="P5">class MinimalSource(BaseModel):</text:p>
      <text:p text:style-name="P5">class MinimalSearchResults(BaseModel):</text:p>
      <text:p text:style-name="P5">class StudentSearchResults(BaseModel)</text:p>
      <text:h text:style-name="P6" text:outline-level="4">Requisitos funcionales</text:h>
      <text:list text:style-name="L1">
        <text:list-item>
          <text:p text:style-name="P7">Convertir una lista de <text:span text:style-name="Source_20_Text">SearchResult</text:span> en una lista de <text:span text:style-name="Source_20_Text">MinimalSource</text:span>.</text:p>
        </text:list-item>
        <text:list-item>
          <text:p text:style-name="P7"><text:soft-page-break/>Construir un objeto <text:span text:style-name="Source_20_Text">MinimalSearchResults</text:span> para una pregunta concreta.</text:p>
        </text:list-item>
        <text:list-item>
          <text:p text:style-name="P7">Construir un objeto <text:span text:style-name="Source_20_Text">StudentSearchResults</text:span> con el valor de <text:span text:style-name="Source_20_Text">k</text:span> usado en la búsqueda.</text:p>
        </text:list-item>
        <text:list-item>
          <text:p text:style-name="P7">Serializar el resultado a JSON usando los modelos Pydantic.</text:p>
        </text:list-item>
        <text:list-item>
          <text:p text:style-name="P7">Mantener separados:</text:p>
          <text:list>
            <text:list-item>
              <text:p text:style-name="P7">el resultado interno de búsqueda;</text:p>
            </text:list-item>
            <text:list-item>
              <text:p text:style-name="P7">el contexto usado por el LLM;</text:p>
            </text:list-item>
            <text:list-item>
              <text:p text:style-name="P7">el JSON entregable del subject.</text:p>
            </text:list-item>
          </text:list>
        </text:list-item>
      </text:list>
      <text:h text:style-name="Heading_20_4" text:outline-level="4">Criterios de aceptación</text:h>
      <text:p text:style-name="Text_20_body">La tarea se considerará completada cuando:</text:p>
      <text:list text:style-name="L2">
        <text:list-item>
          <text:p text:style-name="P8">Una búsqueda Markdown-only pueda generar un JSON válido con el formato del subject.</text:p>
        </text:list-item>
        <text:list-item>
          <text:p text:style-name="P8">El JSON contenga <text:span text:style-name="Source_20_Text">question_id</text:span>, <text:span text:style-name="Source_20_Text">question</text:span>, <text:span text:style-name="Source_20_Text">retrieved_sources</text:span> y <text:span text:style-name="Source_20_Text">k</text:span>.</text:p>
        </text:list-item>
        <text:list-item>
          <text:p text:style-name="P8">Cada elemento de <text:span text:style-name="Source_20_Text">retrieved_sources</text:span> contenga sólo <text:span text:style-name="Source_20_Text">file_path</text:span>, <text:span text:style-name="Source_20_Text">first_character_index</text:span> y <text:span text:style-name="Source_20_Text">last_character_index</text:span>.</text:p>
        </text:list-item>
        <text:list-item>
          <text:p text:style-name="P8">El JSON no contenga el contenido textual del chunk.</text:p>
        </text:list-item>
        <text:list-item>
          <text:p text:style-name="P8">El JSON no contenga scores de similitud.</text:p>
        </text:list-item>
        <text:list-item>
          <text:p text:style-name="P8">Los paths sean relativos al repositorio indexado, no absolutos del sistema.</text:p>
        </text:list-item>
        <text:list-item>
          <text:p text:style-name="P8">El objeto final sea validado por Pydantic antes de guardarse.</text:p>
        </text:list-item>
      </text:list>
      <text:h text:style-name="Heading_20_4" text:outline-level="4">Fuera de alcance por ahora</text:h>
      <text:p text:style-name="Text_20_body">Esta tarea no debe modificar todavía:</text:p>
      <text:p text:style-name="Preformatted_20_Text"><text:span text:style-name="Source_20_Text">TfidfRetriever.search()</text:span></text:p>
      <text:p text:style-name="Preformatted_20_Text"><text:span text:style-name="Source_20_Text">answer_question()</text:span></text:p>
      <text:p text:style-name="Preformatted_20_Text"><text:span text:style-name="Source_20_Text">build_context()</text:span></text:p>
      <text:p text:style-name="Preformatted_20_Text"><text:span text:style-name="Source_20_Text">build_rag_prompt()</text:span></text:p>
      <text:p text:style-name="P1"><text:span text:style-name="Source_20_Text">generate_answer()</text:span></text:p>
      <text:p text:style-name="Text_20_body">Tampoco debe añadir todavía soporte para ficheros <text:span text:style-name="Source_20_Text">.py</text:span>. El objetivo es acercar la salida de búsqueda al formato del subject manteniendo el ciclo actual limitado a Markdow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7T22:08:47.795219742</meta:creation-date>
    <dc:date>2026-05-17T22:12:16.533997312</dc:date>
    <meta:editing-duration>PT3M28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2" meta:paragraph-count="52" meta:word-count="425" meta:character-count="2896" meta:non-whitespace-character-count="2514"/>
  </office:meta>
</office:document-meta>
</file>