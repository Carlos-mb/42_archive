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rsid="000a2d41" officeooo:paragraph-rsid="000a2d41"/>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text-properties officeooo:paragraph-rsid="000cea8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paragraph-properties fo:margin-left="0in" fo:margin-right="0in" fo:text-indent="0in" style:auto-text-indent="false"/>
      <style:text-properties fo:font-weight="bold" officeooo:paragraph-rsid="000a2d41" style:font-weight-asian="bold" style:font-weight-complex="bold"/>
    </style:style>
    <style:style style:name="T1" style:family="text">
      <style:text-properties officeooo:rsid="000a2d41"/>
    </style:style>
    <style:style style:name="T2" style:family="text">
      <style:text-properties officeooo:rsid="000cea8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MER CHUNKER MARKDOWN BÁSICO PARA EL PROYECTO RAG</text:h>
      <text:p text:style-name="Text_20_body">El objetivo de esta tarea es implementar un primer chunker específico para archivos Markdown.</text:p>
      <text:p text:style-name="Text_20_body">Un chunker Markdown básico debe recibir el contenido completo de un archivo Markdown y devolver una lista de fragmentos de texto, llamados chunks, manteniendo siempre la posición exacta de cada fragmento dentro del archivo original.</text:p>
      <text:p text:style-name="Text_20_body">El resultado debe servir como base para indexar documentación en un sistema RAG.</text:p>
      <text:p text:style-name="Text_20_body">La idea principal es:</text:p>
      <text:list xml:id="list2868693358" text:style-name="L1">
        <text:list-item>
          <text:p text:style-name="P4">Si el archivo tiene headings Markdown, dividir el documento en secciones.</text:p>
        </text:list-item>
        <text:list-item>
          <text:p text:style-name="P4">Cada sección empieza en un heading y termina justo antes del siguiente heading.</text:p>
        </text:list-item>
        <text:list-item>
          <text:p text:style-name="P4">Si hay texto antes del primer heading, debe conservarse como un bloque propio.</text:p>
        </text:list-item>
        <text:list-item>
          <text:p text:style-name="P4">Si una sección cabe dentro del tamaño máximo de chunk, se guarda como un único chunk.</text:p>
        </text:list-item>
        <text:list-item>
          <text:p text:style-name="P4">Si una sección supera el tamaño máximo, se divide usando el chunker fijo ya existente.</text:p>
        </text:list-item>
        <text:list-item>
          <text:p text:style-name="P4">Todos los chunks deben conservar offsets absolutos respecto al archivo original.</text:p>
        </text:list-item>
      </text:list>
      <text:h text:style-name="Heading_20_2" text:outline-level="2">La función principal puede llamarse:</text:h>
      <text:p text:style-name="Text_20_body">chunk_markdown_text</text:p>
      <text:p text:style-name="Text_20_body">Debe recibir:</text:p>
      <text:p text:style-name="Text_20_body">file_path<text:line-break/>text<text:line-break/>max_chunk_size<text:line-break/>overlap</text:p>
      <text:h text:style-name="Heading_20_3" text:outline-level="3">Responsabilidad de cada parámetro:</text:h>
      <text:p text:style-name="Text_20_body">file_path:<text:line-break/>Ruta del archivo Markdown. Se guarda en cada chunk para saber de qué archivo procede.</text:p>
      <text:p text:style-name="Text_20_body">text:<text:line-break/>Contenido completo del archivo Markdown, leído como string.</text:p>
      <text:p text:style-name="Text_20_body">max_chunk_size:<text:line-break/>Tamaño máximo permitido para cada chunk, en caracteres.</text:p>
      <text:p text:style-name="P3">overlap:<text:line-break/>Cantidad opcional de caracteres compartidos entre chunks cuando se <text:span text:style-name="T2">trocee un texto (fallback)</text:span>.</text:p>
      <text:h text:style-name="Heading_20_3" text:outline-level="3">La función debe devolver:</text:h>
      <text:p text:style-name="Text_20_body">Una lista de chunks.</text:p>
      <text:p text:style-name="Text_20_body"><text:soft-page-break/>Cada chunk debe contener como mínimo:</text:p>
      <text:p text:style-name="Text_20_body">file_path<text:line-break/>first_character_index<text:line-break/>last_character_index<text:line-break/>content</text:p>
      <text:h text:style-name="Heading_20_2" text:outline-level="2">Convención de índices</text:h>
      <text:p text:style-name="Text_20_body">Se debe usar la convención de rangos semiabiertos:</text:p>
      <text:p text:style-name="Text_20_body">[first_character_index, last_character_index)</text:p>
      <text:p text:style-name="Text_20_body">Esto significa:</text:p>
      <text:p text:style-name="Text_20_body">first_character_index está incluido.<text:line-break/>last_character_index está excluido.</text:p>
      <text:p text:style-name="Text_20_body">Esta convención es la misma que usan los slices de Python y evita muchos errores de borde.</text:p>
      <text:h text:style-name="Heading_20_3" text:outline-level="3">Importante</text:h>
      <text:p text:style-name="Text_20_body">Nunca se deben calcular offsets sobre texto modificado.</text:p>
      <text:p text:style-name="Text_20_body">No se debe hacer:</text:p>
      <text:p text:style-name="Text_20_body">text.strip()<text:line-break/>text.replace()<text:line-break/>normalización de espacios<text:line-break/>eliminación de líneas vacías<text:line-break/>conversión de saltos de línea<text:line-break/>reescritura del contenido</text:p>
      <text:p text:style-name="Text_20_body">Los offsets deben calcularse siempre sobre el texto original leído del archivo.</text:p>
      <text:h text:style-name="Heading_20_2" text:outline-level="2">Definición básica de heading Markdown</text:h>
      <text:p text:style-name="Text_20_body">Para esta primera versión, una línea se considera heading si empieza por el carácter "#".</text:p>
      <text:p text:style-name="Text_20_body">Los saltos de línea forman parte del texto original y cuentan como caracteres. Por tanto, al recorrer líneas se debe conservar el salto de línea. Si se separa el texto por líneas, debe hacerse de una forma que no pierda los saltos de línea. La idea correcta es trabajar con líneas que mantengan el final de línea:</text:p>
      <text:p text:style-name="Text_20_body">"# Intro\n"<text:line-break/>"\n"<text:line-break/>"Alpha paragraph.\n"</text:p>
      <text:h text:style-name="Heading_20_3" text:outline-level="3">Regla para crear chunks desde bloques</text:h>
      <text:p text:style-name="Text_20_body">Para cada bloque detectado:</text:p>
      <text:list xml:id="list3674095363" text:style-name="L2">
        <text:list-item>
          <text:p text:style-name="P5">Calcular su tamaño:</text:p>
        </text:list-item>
      </text:list>
      <text:list xml:id="list12818213" text:style-name="L3">
        <text:list-item>
          <text:p text:style-name="P6"><text:soft-page-break/>Si block_size es menor o igual que max_chunk_size: <text:span text:style-name="T1">c</text:span>rear un único chunk</text:p>
        </text:list-item>
      </text:list>
      <text:list xml:id="list4141382476" text:style-name="L4">
        <text:list-item>
          <text:p text:style-name="P7">Si block_size es mayor que max_chunk_size: Dividir ese bloque usando chunking fijo, pero conservando offsets absolutos del archivo original.</text:p>
        </text:list-item>
      </text:list>
      <text:p text:style-name="P1">Será útil hacer una función que reciba un texto y devuelva el texto fraccionado si es más largo que el max_chunk_size. Esto servirá para otros puntos del proyecto. Recuerda que esa función debe conocer el offset del fichero original.</text:p>
      <text:p text:style-name="P2">Supongamos que una sección Markdown ocupa este rango dentro del archivo:</text:p>
      <text:p text:style-name="P2">block_start = 500<text:line-break/>block_end = 3500</text:p>
      <text:p text:style-name="P2">El contenido del bloque es:</text:p>
      <text:p text:style-name="P2">text[500:3500]</text:p>
      <text:p text:style-name="P2">Si se aplica chunking fijo directamente sobre ese contenido recortado, los offsets resultantes serán relativos al bloque:</text:p>
      <text:p text:style-name="P2">0-2000<text:line-break/>2000-3000</text:p>
      <text:p text:style-name="P2">Pero el sistema necesita offsets absolutos respecto al archivo original:</text:p>
      <text:p text:style-name="P2">500-2500<text:line-break/>2500-3500</text:p>
      <text:p text:style-name="P2">Por tanto, el fallback debe convertir offsets relativos en offsets absolutos.</text:p>
      <text:p text:style-name="P9"><text:span text:style-name="T1">Función </text:span>chunk_text_range</text:p>
      <text:p text:style-name="Text_20_body">Responsabilidad:</text:p>
      <text:p text:style-name="Text_20_body">Dividir sólo una parte del texto original, desde start hasta end, pero generando chunks con coordenadas absolutas.</text:p>
      <text:p text:style-name="Text_20_body">Recibe:</text:p>
      <text:p text:style-name="Text_20_body">file_path<text:line-break/>text<text:line-break/>start<text:line-break/>end<text:line-break/>max_chunk_size<text:line-break/>overlap</text:p>
      <text:p text:style-name="Text_20_body">Devuelve:</text:p>
      <text:p text:style-name="Text_20_body">chunks con offsets absolutos.</text:p>
      <text:h text:style-name="Heading_20_1" text:outline-level="1">Criterio de finalización</text:h>
      <text:p text:style-name="Text_20_body">Esta tarea puede considerarse terminada cuando:</text:p>
      <text:list xml:id="list500735629" text:style-name="L5">
        <text:list-item>
          <text:p text:style-name="P8">Existe una función chunk_markdown_text.</text:p>
        </text:list-item>
        <text:list-item>
          <text:p text:style-name="P8"><text:soft-page-break/>La función detecta headings básicos que empiezan por "#".</text:p>
        </text:list-item>
        <text:list-item>
          <text:p text:style-name="P8">La función conserva texto antes del primer heading.</text:p>
        </text:list-item>
        <text:list-item>
          <text:p text:style-name="P8">La función crea secciones entre headings consecutivos.</text:p>
        </text:list-item>
        <text:list-item>
          <text:p text:style-name="P8">La función usa chunking fijo como fallback cuando una sección supera max_chunk_size.</text:p>
        </text:list-item>
        <text:list-item>
          <text:p text:style-name="P8">Todos los chunks tienen file_path, first_character_index, last_character_index y content.</text:p>
        </text:list-item>
        <text:list-item>
          <text:p text:style-name="P8">Todos los offsets son absolutos respecto al archivo original.</text:p>
        </text:list-item>
        <text:list-item>
          <text:p text:style-name="P8">La lista final de chunks está ordenada por first_character_index.</text:p>
        </text:list-item>
        <text:list-item>
          <text:p text:style-name="P8">No se modifica el texto original para calcular coordenadas.</text:p>
        </text:list-item>
        <text:list-item>
          <text:p text:style-name="P8">No se mezclan responsabilidades de chunking con indexación o generació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1:17:45.151845561</meta:creation-date>
    <dc:date>2026-05-13T20:10:45.250126347</dc:date>
    <meta:editing-duration>PT10M56S</meta:editing-duration>
    <meta:editing-cycles>5</meta:editing-cycles>
    <meta:generator>LibreOffice/7.3.7.2$Linux_X86_64 LibreOffice_project/30$Build-2</meta:generator>
    <meta:document-statistic meta:table-count="0" meta:image-count="0" meta:object-count="0" meta:page-count="4" meta:paragraph-count="73" meta:word-count="691" meta:character-count="4607" meta:non-whitespace-character-count="4008"/>
  </office:meta>
</office:document-meta>
</file>