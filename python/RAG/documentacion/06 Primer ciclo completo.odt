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f64a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0f64af"/>
    </style:style>
    <style:style style:name="P7" style:family="paragraph" style:parent-style-name="Text_20_body" style:list-style-name="L5"/>
    <style:style style:name="P8" style:family="paragraph" style:parent-style-name="Text_20_body">
      <style:paragraph-properties fo:margin-left="0.4925in" fo:text-indent="0in" style:auto-text-indent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T1" style:family="text">
      <style:text-properties officeooo:rsid="000f64af"/>
    </style:style>
    <style:style style:name="T2" style:family="text">
      <style:text-properties officeooo:rsid="00157c9f"/>
    </style:style>
    <style:style style:name="T3" style:family="text">
      <style:text-properties officeooo:rsid="00162b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ICLO RAG COMPLETO SÓLO CON MARKDOWN</text:p>
      <text:p text:style-name="Text_20_body">Objetivo de la tarea</text:p>
      <text:p text:style-name="Text_20_body">Implementar el primer ciclo completo de interacción RAG usando únicamente archivos Markdown.</text:p>
      <text:p text:style-name="Text_20_body">El siguiente paso es cerrar el ciclo RAG mínimo:</text:p>
      <text:p text:style-name="P1">pregunta del usuario<text:line-break/>→ búsqueda TF-IDF sobre chunks Markdown<text:line-break/>→ selección de top-k chunks<text:line-break/>→ construcción de contexto<text:line-break/>→ construcción de prompt<text:line-break/>→ llamada al modelo Qwen/Qwen3-0.6B<text:line-break/>→ respuesta textual<text:line-break/>→ mostrar fuentes utilizadas</text:p>
      <text:h text:style-name="Heading_20_1" text:outline-level="1">Alcance de la tarea</text:h>
      <text:p text:style-name="Text_20_body">El flujo completo debe ser:</text:p>
      <text:list text:style-name="L1">
        <text:list-item>
          <text:p text:style-name="P2">Cargar chunks desde disco. <text:span text:style-name="T1">P.e.: </text:span>data/processed/chunks_markdown.json</text:p>
        </text:list-item>
      </text:list>
      <text:list text:style-name="L2">
        <text:list-item>
          <text:p text:style-name="P3">Construir el índice TF-IDF.</text:p>
        </text:list-item>
        <text:list-item>
          <text:p text:style-name="P3">Recibir una pregunta manual.</text:p>
        </text:list-item>
      </text:list>
      <text:p text:style-name="Text_20_body">Ejemplo: How can I run the OpenAI compatible server?</text:p>
      <text:list text:style-name="L3">
        <text:list-item>
          <text:p text:style-name="P4">Buscar top-k chunks relevantes.</text:p>
        </text:list-item>
        <text:list-item>
          <text:p text:style-name="P4">Construir contexto usando esos chunks.</text:p>
        </text:list-item>
        <text:list-item>
          <text:p text:style-name="P4">Crear prompt para el LLM.</text:p>
        </text:list-item>
        <text:list-item>
          <text:p text:style-name="P4">Ejecutar Qwen/Qwen3-0.6B.</text:p>
        </text:list-item>
        <text:list-item>
          <text:p text:style-name="P4">Mostrar <text:span text:style-name="T1">resultado</text:span>:</text:p>
        </text:list-item>
      </text:list>
      <text:list text:style-name="L4">
        <text:list-item>
          <text:p text:style-name="P5">respuesta generada;</text:p>
        </text:list-item>
        <text:list-item>
          <text:p text:style-name="P6">fuentes utilizadas;</text:p>
        </text:list-item>
      </text:list>
      <text:h text:style-name="Heading_20_1" text:outline-level="1">Función para construir contexto</text:h>
      <text:p text:style-name="Text_20_body">Crear una función: build_context(results/<text:span text:style-name="T2">chunks</text:span>) -&gt; str</text:p>
      <text:p text:style-name="Text_20_body"><text:soft-page-break/>Responsabilidad: Convertir los resultados de búsqueda en un bloque de texto que pueda pasarse al LLM.</text:p>
      <text:p text:style-name="P1">Entrada: </text:p>
      <text:p text:style-name="P1">results:<text:line-break/>Lista de resultados de búsqueda devueltos por el retriever.</text:p>
      <text:p text:style-name="Text_20_body">Salida:</text:p>
      <text:p text:style-name="Text_20_body">Un string con el contexto.</text:p>
      <text:p text:style-name="Text_20_body">Formato recomendado del contexto:</text:p>
      <text:p text:style-name="Text_20_body">[Source 1]<text:line-break/>file_path: docs/serving/openai_compatible_server.md<text:line-break/>range: 1200-1800<text:line-break/>content:<text:line-break/>...</text:p>
      <text:p text:style-name="Text_20_body">[Source 2]<text:line-break/>file_path: docs/some_file.md<text:line-break/>range: 300-900<text:line-break/>content:<text:line-break/>...</text:p>
      <text:p text:style-name="Text_20_body">Reglas:</text:p>
      <text:list text:style-name="L5">
        <text:list-item>
          <text:p text:style-name="P7">Los chunks deben añadirse en orden de relevancia.</text:p>
        </text:list-item>
        <text:list-item>
          <text:p text:style-name="P7">Si un chunk no cabe completo, se puede omitir.</text:p>
        </text:list-item>
        <text:list-item>
          <text:p text:style-name="P7">No modificar el contenido del chunk.</text:p>
        </text:list-item>
        <text:list-item>
          <text:p text:style-name="P7">Mantener claramente identificada cada fuente.</text:p>
        </text:list-item>
      </text:list>
      <text:p text:style-name="Text_20_body">No hace falta resumir ni transformar el contenido. El contexto debe ser texto fuente.</text:p>
      <text:p text:style-name="Text_20_body"/>
      <text:h text:style-name="Heading_20_1" text:outline-level="1">Función para construir el prompt</text:h>
      <text:p text:style-name="Text_20_body">Crear una función: build_rag_prompt(question, context) -&gt; str</text:p>
      <text:p text:style-name="Text_20_body">Responsabilidad: Crear el prompt que se enviará al modelo.</text:p>
      <text:p text:style-name="Text_20_body">Entrada:</text:p>
      <text:p text:style-name="Text_20_body">question:<text:line-break/>Pregunta del usuario.</text:p>
      <text:p text:style-name="Text_20_body"><text:soft-page-break/>context:<text:line-break/>Texto construido a partir de los chunks recuperados.</text:p>
      <text:p text:style-name="Text_20_body">Salida:</text:p>
      <text:p text:style-name="Text_20_body">Prompt completo para Qwen.</text:p>
      <text:p text:style-name="Text_20_body">Prompt recomendado:</text:p>
      <text:p text:style-name="P8">You are a technical assistant answering questions about the vLLM repository.</text:p>
      <text:p text:style-name="P8">Use only the provided context to answer the question.<text:line-break/>If the context does not contain enough information, say that the provided context is insufficient.<text:line-break/>Do not invent details that are not supported by the context.</text:p>
      <text:p text:style-name="P8">Context:<text:line-break/>{context}</text:p>
      <text:p text:style-name="P8">Question:<text:line-break/>{question}</text:p>
      <text:p text:style-name="P8">Answer:</text:p>
      <text:h text:style-name="Heading_20_1" text:outline-level="1">Integración con Qwen/Qwen3-0.6B</text:h>
      <text:p text:style-name="Text_20_body">La tarea debe integrar el modelo de la misma forma que el proyecto anterior <text:span text:style-name="Source_20_Text">Call me maybe</text:span>, si se está usando el mismo SDK o una interfaz similar.</text:p>
      <text:p text:style-name="Text_20_body">La función puede llamarse: generate_answer(prompt) -&gt; str</text:p>
      <text:p text:style-name="Text_20_body">Responsabilidad:</text:p>
      <text:p text:style-name="Text_20_body">Enviar el prompt al modelo y devolver la respuesta generada.</text:p>
      <text:p text:style-name="Text_20_body">El objetivo es comprobar que:</text:p>
      <text:list text:style-name="L6">
        <text:list-item>
          <text:p text:style-name="P9">el prompt llega al modelo;</text:p>
        </text:list-item>
        <text:list-item>
          <text:p text:style-name="P9">el modelo devuelve texto;</text:p>
        </text:list-item>
        <text:list-item>
          <text:p text:style-name="P9">la respuesta se basa razonablemente en el contexto;</text:p>
        </text:list-item>
        <text:list-item>
          <text:p text:style-name="P9">el sistema puede mostrar la respuesta y las fuentes.</text:p>
        </text:list-item>
      </text:list>
      <text:p text:style-name="Text_20_body">Si el SDK disponible no tiene una función directa de generación textual, se debe crear una primera versión mínima compatible con la interfaz real del modelo.</text:p>
      <text:h text:style-name="Heading_20_1" text:outline-level="1">Función principal de respuesta Markdown-only</text:h>
      <text:p text:style-name="Text_20_body">Crear una función: answer_markdown_question(question, chunks_path, k) -&gt; None</text:p>
      <text:p text:style-name="Text_20_body">Responsabilidad: Ejecutar el ciclo completo para una pregunta manual.</text:p>
      <text:p text:style-name="Text_20_body"><text:soft-page-break/>Proceso:</text:p>
      <text:list text:style-name="L7">
        <text:list-item>
          <text:p text:style-name="P10">Cargar chunks desde <text:span text:style-name="Source_20_Text">chunks_path</text:span>.</text:p>
        </text:list-item>
        <text:list-item>
          <text:p text:style-name="P10">Crear <text:span text:style-name="Source_20_Text">TfidfRetriever</text:span>.</text:p>
        </text:list-item>
        <text:list-item>
          <text:p text:style-name="P10">Construir índice con <text:span text:style-name="Source_20_Text">build_index()</text:span>.</text:p>
        </text:list-item>
        <text:list-item>
          <text:p text:style-name="P10">Ejecutar búsqueda con <text:span text:style-name="Source_20_Text">search(question, k)</text:span>.</text:p>
        </text:list-item>
        <text:list-item>
          <text:p text:style-name="P10">Construir contexto con <text:span text:style-name="Source_20_Text">build_context()</text:span>.</text:p>
        </text:list-item>
        <text:list-item>
          <text:p text:style-name="P10">Construir prompt con <text:span text:style-name="Source_20_Text">build_rag_prompt()</text:span>.</text:p>
        </text:list-item>
        <text:list-item>
          <text:p text:style-name="P10">Generar respuesta con Qwen.</text:p>
        </text:list-item>
        <text:list-item>
          <text:p text:style-name="P10">Imprimir respuesta.</text:p>
        </text:list-item>
        <text:list-item>
          <text:p text:style-name="P10">Imprimir fuentes usadas.</text:p>
        </text:list-item>
      </text:list>
      <text:p text:style-name="Text_20_body">Esta función puede vivir provisionalmente en un script de desarrollo, por ejemplo:</text:p>
      <text:p text:style-name="Text_20_body">dev_markdown_rag_test.py</text:p>
      <text:p text:style-name="Text_20_body">No hace falta integrarla todavía en una CLI definitiva.</text:p>
      <text:h text:style-name="Heading_20_1" text:outline-level="1">Criterios de aceptación</text:h>
      <text:p text:style-name="Text_20_body">La tarea se considera completada cuando:</text:p>
      <text:list text:style-name="L8">
        <text:list-item>
          <text:p text:style-name="P11">Existe una función o script que carga chunks Markdown desde JSON.</text:p>
        </text:list-item>
        <text:list-item>
          <text:p text:style-name="P11">Se construye un índice TF-IDF sobre esos chunks.</text:p>
        </text:list-item>
        <text:list-item>
          <text:p text:style-name="P11">Se puede ejecutar una query manual.</text:p>
        </text:list-item>
        <text:list-item>
          <text:p text:style-name="P11">Se recuperan top-k chunks relevantes.</text:p>
        </text:list-item>
        <text:list-item>
          <text:p text:style-name="P11">Se construye un contexto textual usando los chunks recuperados.</text:p>
        </text:list-item>
        <text:list-item>
          <text:p text:style-name="P11">Se construye un prompt RAG simple.</text:p>
        </text:list-item>
        <text:list-item>
          <text:p text:style-name="P11">Se llama a Qwen/Qwen3-0.6B.</text:p>
        </text:list-item>
        <text:list-item>
          <text:p text:style-name="P11">Se obtiene una respuesta textual.</text:p>
        </text:list-item>
        <text:list-item>
          <text:p text:style-name="P11">Se imprimen las fuentes usadas.</text:p>
        </text:list-item>
      </text:list>
      <text:h text:style-name="Heading_20_1" text:outline-level="1">Resumen para el programador</text:h>
      <text:p text:style-name="Text_20_body">Implementa una prueba vertical mínima del RAG usando sólo Markdown.</text:p>
      <text:p text:style-name="Text_20_body">Entrada:</text:p>
      <text:p text:style-name="Text_20_body"><text:soft-page-break/>pregunta del usuario</text:p>
      <text:p text:style-name="Text_20_body">Proceso:</text:p>
      <text:p text:style-name="Text_20_body">chunks Markdown guardados<text:line-break/>→ load_chunks<text:line-break/>→ TF-IDF search<text:line-break/>→ top-k chunks<text:line-break/>→ contexto<text:line-break/>→ prompt<text:line-break/>→ Qwen</text:p>
      <text:p text:style-name="Text_20_body">Salida:</text:p>
      <text:p text:style-name="Text_20_body">respuesta textual <text:span text:style-name="T3">+ </text:span>fuentes utilizada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8:40:50.298828820</meta:creation-date>
    <dc:date>2026-05-17T21:33:08.679135994</dc:date>
    <meta:editing-duration>PT2H45M2S</meta:editing-duration>
    <meta:editing-cycles>11</meta:editing-cycles>
    <meta:generator>LibreOffice/25.2.3.2$Linux_X86_64 LibreOffice_project/520$Build-2</meta:generator>
    <meta:document-statistic meta:table-count="0" meta:image-count="0" meta:object-count="0" meta:page-count="5" meta:paragraph-count="94" meta:word-count="647" meta:character-count="4268" meta:non-whitespace-character-count="3750"/>
  </office:meta>
</office:document-meta>
</file>